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ank Ruhl Libre" svg:font-family="'Frank Ruhl Libre',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00%" fo:text-align="center" style:justify-single-word="false"/>
    </style:style>
    <style:style style:name="P2" style:family="paragraph" style:parent-style-name="Text_20_body">
      <style:paragraph-properties fo:margin-left="0in" fo:margin-right="0in" fo:margin-top="0in" fo:margin-bottom="0in" style:contextual-spacing="false" fo:line-height="100%" fo:orphans="2" fo:widows="2" fo:text-indent="0in" style:auto-text-indent="false" fo:padding="0in" fo:border="none"/>
      <style:text-properties fo:font-variant="normal" fo:text-transform="none" fo:color="#222222" loext:opacity="100%" style:font-name="Frank Ruhl Libre" fo:font-size="13pt" fo:letter-spacing="normal" fo:font-style="normal" fo:font-weight="normal" style:font-size-asian="13pt" style:font-size-complex="13pt"/>
    </style:style>
    <style:style style:name="P3" style:family="paragraph" style:parent-style-name="Standard">
      <style:paragraph-properties fo:line-height="100%"/>
    </style:style>
    <style:style style:name="T1" style:family="text">
      <style:text-properties fo:font-variant="normal" fo:text-transform="none" fo:color="#222222" loext:opacity="100%" fo:font-family="Inter, sans-serif" fo:font-size="20.5pt" fo:letter-spacing="normal" fo:font-style="normal" fo:font-weight="bold" style:font-size-asian="20.5pt" style:font-size-complex="2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A Rainy Day</text:span></text:span></text:h>
      <text:p text:style-name="P2">A rainy day is a day when the sky is full of dark clouds and rain falls continuously. Such days are very refreshing, especially after hot and dry weather. The air becomes cool and fresh, and everything around looks lively. Trees, plants, and gardens appear greener, and rivers, ponds, and lakes are filled with water. The gentle sound of raindrops creates a peaceful and calming atmosphere, making people feel relaxed.</text:p>
      <text:p text:style-name="P2">On a rainy day, people use umbrellas, raincoats, and boots to protect themselves from getting wet. Roads often become muddy and slippery, and waterlogging can cause difficulties in traveling. Despite these challenges, students enjoy rainy days because they often get holidays or spend time playing indoor games at home. Farmers are very happy during rain as it is essential for growing crops and improving soil fertility.</text:p>
      <text:p text:style-name="P2">However, heavy rain can sometimes cause problems such as flooding, traffic jams, and illnesses like cold and flu. In conclusion, a rainy day has both advantages and disadvantages, but it is a blessing of nature. It refreshes the environment, provides water for crops, and brings joy and comfort to all living beings.</text:p>
      <text:h text:style-name="P1" text:outline-level="2"><text:span text:style-name="Strong_20_Emphasis"><text:span text:style-name="T1">A Winter Morning</text:span></text:span></text:h>
      <text:p text:style-name="P2">A winter morning is a unique and refreshing experience. The cold air, soft sunlight, and gentle fog create a calm and peaceful atmosphere. The sun rises slowly, casting golden rays on the frost-covered ground. Trees, fields, and streets look beautiful under a light layer of frost. Birds chirp softly, and people wrap themselves in warm clothes to protect against the chill. Children enjoy playing outside, making small frost patterns or flying kites in the clear morning air. Farmers start their work early, carefully tending to their crops despite the cold weather.</text:p>
      <text:p text:style-name="P2">A winter morning not only brings freshness to nature but also energizes the body and mind. Walking in the cool air helps improve health, concentration, and alertness. It is also an ideal time for study, meditation, or other productive activities. Observing a winter morning teaches students to appreciate the beauty of nature, develop patience, and enjoy the simple joys of life.</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ank Ruhl Libre" svg:font-family="'Frank Ruhl Libre',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RMAN</meta:initial-creator>
    <meta:creation-date>2026-04-21T15:30:37.477681039</meta:creation-date>
    <dc:date>2026-04-21T15:33:56.510076391</dc:date>
    <dc:creator>ARMAN</dc:creator>
    <meta:editing-duration>PT3M21S</meta:editing-duration>
    <meta:editing-cycles>1</meta:editing-cycles>
    <meta:document-statistic meta:table-count="0" meta:image-count="0" meta:object-count="0" meta:page-count="1" meta:paragraph-count="7" meta:word-count="346" meta:character-count="2128" meta:non-whitespace-character-count="1789"/>
    <meta:generator>LibreOffice/25.8.5.2$Linux_X86_64 LibreOffice_project/580$Build-2</meta:generator>
  </office:meta>
</office:document-meta>
</file>
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loext:opacity="100%" style:font-name="Google Sans" fo:font-size="12pt" fo:letter-spacing="normal" fo:font-style="normal" fo:font-weight="normal" officeooo:paragraph-rsid="00007948" fo:background-color="transparent" style:font-size-asian="12pt" style:font-size-complex="12pt"/>
    </style:style>
    <style:style style:name="P2" style:family="paragraph" style:parent-style-name="Standard">
      <style:paragraph-properties fo:margin-left="0in" fo:margin-right="0in" fo:orphans="2" fo:widows="2" fo:text-indent="0in" style:auto-text-indent="false"/>
      <style:text-properties fo:font-variant="normal" fo:text-transform="none" fo:color="#000000" loext:opacity="100%" style:font-name="Google Sans" fo:font-size="12pt" fo:letter-spacing="normal" fo:font-style="normal" fo:font-weight="normal" officeooo:paragraph-rsid="00007c7a" fo:background-color="transparent" style:font-size-asian="12pt" style:font-size-complex="12pt"/>
    </style:style>
    <style:style style:name="P3" style:family="paragraph" style:parent-style-name="Standard">
      <style:paragraph-properties fo:margin-left="0in" fo:margin-right="0in" fo:orphans="2" fo:widows="2" fo:text-indent="0in" style:auto-text-indent="false"/>
      <style:text-properties fo:font-variant="normal" fo:text-transform="none" fo:color="#000000" loext:opacity="100%" style:font-name="Google Sans" fo:font-size="12pt" fo:letter-spacing="normal" fo:font-style="normal" fo:font-weight="bold" officeooo:paragraph-rsid="00007c7a" fo:background-color="transparent" style:font-size-asian="12pt" style:font-size-complex="12pt"/>
    </style:style>
    <style:style style:name="P4" style:family="paragraph" style:parent-style-name="Standard">
      <style:paragraph-properties fo:margin-left="0in" fo:margin-right="0in" fo:text-indent="0in" style:auto-text-indent="false"/>
      <style:text-properties fo:color="#000000" loext:opacity="100%" fo:font-size="12pt" fo:background-color="transparent" style:font-size-asian="12pt" style:font-size-complex="12pt"/>
    </style:style>
    <style:style style:name="P5" style:family="paragraph" style:parent-style-name="Text_20_body" style:list-style-name="L1">
      <style:paragraph-properties fo:margin-left="0in" fo:margin-right="0in" fo:margin-top="0in" fo:margin-bottom="0.1665in" style:contextual-spacing="false" style:line-height-at-least="0.25in" fo:text-indent="0in" style:auto-text-indent="false" fo:padding="0in" fo:border="none"/>
      <style:text-properties fo:color="#000000" loext:opacity="100%" style:font-name="Google Sans"/>
    </style:style>
    <style:style style:name="P6" style:family="paragraph" style:parent-style-name="Text_20_body" style:list-style-name="L1">
      <style:paragraph-properties fo:margin-left="0in" fo:margin-right="0in" fo:margin-top="0in" fo:margin-bottom="0.1665in" style:contextual-spacing="false" style:line-height-at-least="0.25in" fo:text-indent="0in" style:auto-text-indent="false" fo:padding="0in" fo:border="none"/>
      <style:text-properties fo:color="#000000" loext:opacity="100%" style:font-name="Google Sans" fo:font-size="12pt"/>
    </style:style>
    <style:style style:name="P7" style:family="paragraph" style:parent-style-name="Text_20_body" style:list-style-name="L1">
      <style:paragraph-properties fo:margin-left="0in" fo:margin-right="0in" fo:margin-top="0in" fo:margin-bottom="0.1665in" style:contextual-spacing="false" style:line-height-at-least="0.25in" fo:text-indent="0in" style:auto-text-indent="false" fo:padding="0in" fo:border="none"/>
      <style:text-properties fo:color="#000000" loext:opacity="100%" style:font-name="Google Sans" fo:font-size="12pt" fo:background-color="transparent" style:font-size-asian="12pt" style:font-size-complex="12pt"/>
    </style:style>
    <style:style style:name="P8" style:family="paragraph" style:parent-style-name="Text_20_body" style:list-style-name="L1">
      <style:paragraph-properties fo:margin-left="0in" fo:margin-right="0in" fo:margin-top="0in" fo:margin-bottom="0.1665in" style:contextual-spacing="false" style:line-height-at-least="0.25in" fo:text-indent="0in" style:auto-text-indent="false" fo:padding="0in" fo:border="none"/>
      <style:text-properties fo:color="#000000" loext:opacity="100%" style:font-name="Google Sans" officeooo:paragraph-rsid="00007c7a"/>
    </style:style>
    <style:style style:name="P9" style:family="paragraph" style:parent-style-name="Text_20_body">
      <style:paragraph-properties fo:margin-left="0in" fo:margin-right="0in" fo:margin-top="0.3126in" fo:margin-bottom="0.1665in" style:contextual-spacing="false" style:line-height-at-least="0.2917in" fo:text-indent="0in" style:auto-text-indent="false"/>
      <style:text-properties fo:color="#000000" loext:opacity="100%" style:font-name="Google Sans" fo:font-size="12pt" fo:font-weight="bold" officeooo:paragraph-rsid="00007c7a" fo:background-color="transparent" style:font-size-asian="12pt" style:font-size-complex="12pt"/>
    </style:style>
    <style:style style:name="P10" style:family="paragraph" style:parent-style-name="Text_20_body" style:list-style-name="L2">
      <style:paragraph-properties fo:margin-left="0in" fo:margin-right="0in" fo:margin-top="0in" fo:margin-bottom="0.1665in" style:contextual-spacing="false" style:line-height-at-least="0.25in" fo:text-indent="0in" style:auto-text-indent="false" fo:padding="0in" fo:border="none"/>
      <style:text-properties fo:color="#000000" loext:opacity="100%" style:font-name="Google Sans"/>
    </style:style>
    <style:style style:name="P11" style:family="paragraph" style:parent-style-name="Text_20_body" style:list-style-name="L2">
      <style:paragraph-properties fo:margin-left="0in" fo:margin-right="0in" fo:margin-top="0in" fo:margin-bottom="0.1665in" style:contextual-spacing="false" style:line-height-at-least="0.25in" fo:text-indent="0in" style:auto-text-indent="false" fo:padding="0in" fo:border="none"/>
      <style:text-properties fo:color="#000000" loext:opacity="100%" style:font-name="Google Sans" fo:font-size="12pt" officeooo:paragraph-rsid="00007c7a"/>
    </style:style>
    <style:style style:name="P12" style:family="paragraph" style:parent-style-name="Text_20_body" style:list-style-name="L2">
      <style:paragraph-properties fo:margin-left="0in" fo:margin-right="0in" fo:margin-top="0in" fo:margin-bottom="0.1665in" style:contextual-spacing="false" style:line-height-at-least="0.25in" fo:text-indent="0in" style:auto-text-indent="false" fo:padding="0in" fo:border="none"/>
      <style:text-properties fo:color="#000000" loext:opacity="100%" style:font-name="Google Sans" officeooo:paragraph-rsid="00007c7a"/>
    </style:style>
    <style:style style:name="P13" style:family="paragraph" style:parent-style-name="Text_20_body" style:list-style-name="L2">
      <style:paragraph-properties fo:margin-left="0in" fo:margin-right="0in" fo:margin-top="0in" fo:margin-bottom="0.1665in" style:contextual-spacing="false" style:line-height-at-least="0.25in" fo:text-indent="0in" style:auto-text-indent="false" fo:padding="0in" fo:border="none"/>
      <style:text-properties fo:color="#000000" loext:opacity="100%" style:font-name="Google Sans" fo:font-size="12pt"/>
    </style:style>
    <style:style style:name="P14" style:family="paragraph" style:parent-style-name="Text_20_body" style:list-style-name="L2">
      <style:paragraph-properties fo:margin-left="0in" fo:margin-right="0in" fo:margin-top="0in" fo:margin-bottom="0.1665in" style:contextual-spacing="false" style:line-height-at-least="0.25in" fo:text-indent="0in" style:auto-text-indent="false" fo:padding="0in" fo:border="none"/>
      <style:text-properties fo:color="#000000" loext:opacity="100%" style:font-name="Google Sans" fo:font-size="12pt" officeooo:paragraph-rsid="00016ae9"/>
    </style:style>
    <style:style style:name="P15" style:family="paragraph" style:parent-style-name="Text_20_body">
      <style:paragraph-properties fo:margin-left="0in" fo:margin-right="0in" fo:margin-top="0.3126in" fo:margin-bottom="0.1665in" style:contextual-spacing="false" style:line-height-at-least="0.2917in" fo:text-indent="0in" style:auto-text-indent="false"/>
      <style:text-properties fo:color="#000000" loext:opacity="100%" style:font-name="Google Sans" fo:font-size="12pt" fo:font-weight="bold" officeooo:paragraph-rsid="00016ae9" fo:background-color="transparent" style:font-size-asian="12pt" style:font-size-complex="12pt"/>
    </style:style>
    <style:style style:name="P16" style:family="paragraph" style:parent-style-name="Text_20_body" style:list-style-name="L3">
      <style:paragraph-properties fo:margin-left="0in" fo:margin-right="0in" fo:margin-top="0in" fo:margin-bottom="0.1665in" style:contextual-spacing="false" style:line-height-at-least="0.25in" fo:text-indent="0in" style:auto-text-indent="false" fo:padding="0in" fo:border="none"/>
      <style:text-properties fo:color="#000000" loext:opacity="100%" style:font-name="Google Sans"/>
    </style:style>
    <style:style style:name="P17" style:family="paragraph" style:parent-style-name="Text_20_body" style:list-style-name="L3">
      <style:paragraph-properties fo:margin-left="0in" fo:margin-right="0in" fo:margin-top="0in" fo:margin-bottom="0.1665in" style:contextual-spacing="false" style:line-height-at-least="0.25in" fo:text-indent="0in" style:auto-text-indent="false" fo:padding="0in" fo:border="none"/>
      <style:text-properties fo:color="#000000" loext:opacity="100%" style:font-name="Google Sans" fo:font-size="12pt"/>
    </style:style>
    <style:style style:name="P18" style:family="paragraph" style:parent-style-name="Text_20_body">
      <style:paragraph-properties fo:margin-left="0in" fo:margin-right="0in" fo:margin-top="0.3126in" fo:margin-bottom="0.1665in" style:contextual-spacing="false" style:line-height-at-least="0.2917in" fo:text-indent="0in" style:auto-text-indent="false"/>
      <style:text-properties fo:color="#000000" loext:opacity="100%" fo:font-size="12pt" fo:background-color="transparent" style:font-size-asian="12pt" style:font-size-complex="12pt"/>
    </style:style>
    <style:style style:name="P19" style:family="paragraph" style:parent-style-name="Text_20_body" style:list-style-name="L4">
      <style:paragraph-properties fo:margin-left="0in" fo:margin-right="0in" fo:margin-top="0in" fo:margin-bottom="0.1665in" style:contextual-spacing="false" style:line-height-at-least="0.25in" fo:text-indent="0in" style:auto-text-indent="false" fo:padding="0in" fo:border="none"/>
      <style:text-properties fo:color="#000000" loext:opacity="100%" style:font-name="Google Sans"/>
    </style:style>
    <style:style style:name="P20" style:family="paragraph" style:parent-style-name="Text_20_body" style:list-style-name="L4">
      <style:paragraph-properties fo:margin-left="0in" fo:margin-right="0in" fo:margin-top="0in" fo:margin-bottom="0.1665in" style:contextual-spacing="false" style:line-height-at-least="0.25in" fo:text-indent="0in" style:auto-text-indent="false" fo:padding="0in" fo:border="none"/>
      <style:text-properties fo:color="#000000" loext:opacity="100%" style:font-name="Google Sans" fo:font-size="12pt"/>
    </style:style>
    <style:style style:name="T1" style:family="text">
      <style:text-properties style:font-weight-asian="bold" style:font-weight-complex="bold"/>
    </style:style>
    <style:style style:name="T2" style:family="text">
      <style:text-properties style:font-name-complex="Google Sans" style:font-style-complex="normal" style:font-weight-complex="normal"/>
    </style:style>
    <style:style style:name="T3" style:family="text">
      <style:text-properties fo:font-weight="normal"/>
    </style:style>
    <style:style style:name="T4" style:family="text">
      <style:text-properties style:font-name="Google Sans" fo:font-weight="bold"/>
    </style:style>
    <style:style style:name="T5" style:family="text">
      <style:text-properties fo:font-size="12pt" fo:font-weight="bold" fo:background-color="transparent" loext:char-shading-value="0" style:font-size-asian="12pt" style:font-size-complex="12pt"/>
    </style:style>
    <style:style style:name="T6" style:family="text">
      <style:text-properties fo:font-size="12pt" fo:background-color="transparent" loext:char-shading-value="0" style:font-size-asian="12pt" style:font-size-complex="12pt"/>
    </style:style>
    <style:style style:name="T7" style:family="text">
      <style:text-properties fo:font-variant="normal" fo:text-transform="none" fo:letter-spacing="normal" fo:background-color="transparent" loext:char-shading-value="0" style:font-size-asian="12pt" style:font-name-complex="Google Sans" style:font-size-complex="12pt" style:font-style-complex="normal" style:font-weight-complex="bold"/>
    </style:style>
    <style:style style:name="T8" style:family="text">
      <style:text-properties fo:font-variant="normal" fo:text-transform="none" fo:letter-spacing="normal" fo:font-style="normal" fo:font-weight="bold" fo:background-color="transparent" loext:char-shading-value="0" style:font-size-asian="12pt" style:font-size-complex="12pt"/>
    </style:style>
    <style:style style:name="T9" style:family="text">
      <style:text-properties fo:font-variant="normal" fo:text-transform="none" fo:letter-spacing="normal" fo:font-style="normal" fo:font-weight="normal" fo:background-color="transparent" loext:char-shading-value="0" style:font-size-asian="12pt" style:font-size-complex="12pt"/>
    </style:style>
    <style:style style:name="T10" style:family="text">
      <style:text-properties fo:font-variant="normal" fo:text-transform="none" fo:letter-spacing="normal" fo:background-color="transparent" loext:char-shading-value="0" style:font-size-asian="12pt" style:font-name-complex="Google Sans" style:font-size-complex="12pt" style:font-style-complex="normal" style:font-weight-complex="normal"/>
    </style:style>
    <style:style style:name="T11" style:family="text">
      <style:text-properties fo:font-variant="normal" fo:text-transform="none" fo:font-size="12pt" fo:letter-spacing="normal" fo:background-color="transparent" loext:char-shading-value="0" style:font-size-asian="12pt" style:font-name-complex="Google Sans" style:font-size-complex="12pt" style:font-style-complex="normal" style:font-weight-complex="bold"/>
    </style:style>
    <style:style style:name="T12" style:family="text">
      <style:text-properties fo:font-variant="normal" fo:text-transform="none" fo:font-size="12pt" fo:letter-spacing="normal" fo:font-style="normal" fo:font-weight="bold" fo:background-color="transparent" loext:char-shading-value="0" style:font-size-asian="12pt" style:font-size-complex="12pt"/>
    </style:style>
    <style:style style:name="T13" style:family="text">
      <style:text-properties fo:font-variant="normal" fo:text-transform="none" fo:font-size="12pt" fo:letter-spacing="normal" fo:font-style="normal" fo:font-weight="normal" fo:background-color="transparent" loext:char-shading-value="0" style:font-size-asian="12pt" style:font-size-complex="12pt"/>
    </style:style>
    <style:style style:name="T14" style:family="text">
      <style:text-properties fo:font-variant="normal" fo:text-transform="none" fo:font-size="12pt" fo:letter-spacing="normal" fo:background-color="transparent" loext:char-shading-value="0" style:font-size-asian="12pt" style:font-name-complex="Google Sans" style:font-size-complex="12pt" style:font-style-complex="normal" style:font-weight-complex="normal"/>
    </style:style>
    <style:style style:name="T15" style:family="text">
      <style:text-properties fo:font-variant="normal" fo:text-transform="none" fo:letter-spacing="normal" style:font-name-complex="Google Sans" style:font-style-complex="normal" style:font-weight-complex="bold"/>
    </style:style>
    <style:style style:name="T16" style:family="text">
      <style:text-properties fo:font-variant="normal" fo:text-transform="none" fo:letter-spacing="normal" fo:font-style="normal"/>
    </style:style>
    <style:style style:name="T17" style:family="text">
      <style:text-properties fo:font-variant="normal" fo:text-transform="none" style:font-name="Google Sans" fo:letter-spacing="normal" fo:font-style="normal" fo:font-weight="bold"/>
    </style:style>
    <style:style style:name="T18" style:family="text">
      <style:text-properties fo:font-size="12pt" fo:background-color="transparent" loext:char-shading-value="0" style:font-size-asian="12pt" style:font-name-complex="Google Sans" style:font-size-complex="12pt" style:font-weight-complex="bold"/>
    </style:style>
    <style:style style:name="T19" style:family="text">
      <style:text-properties fo:font-size="12pt" fo:background-color="transparent" loext:char-shading-value="0" style:font-size-asian="12pt" style:font-name-complex="Google Sans" style:font-size-complex="12pt"/>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8">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3">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17">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ngladesh </text:p>
      <text:p text:style-name="P1">My friend came to me, with sadness in his eyes </text:p>
      <text:p text:style-name="P1">He told me that he wanted help </text:p>
      <text:p text:style-name="P1">Before his country dies </text:p>
      <text:p text:style-name="P1">Although I couldn't feel the pain, I knew I had to try </text:p>
      <text:p text:style-name="P1">Now, I'm asking all of you To help us save some lives, </text:p>
      <text:p text:style-name="P1">Bangladesh <text:span text:style-name="T1">Bangladesh </text:span></text:p>
      <text:p text:style-name="P1">Where so many people are dying fast </text:p>
      <text:p text:style-name="P1">And it sure looks like a mess </text:p>
      <text:p text:style-name="P1">I've never seen such distress </text:p>
      <text:p text:style-name="P1">Now, won't you lend your hand and understand </text:p>
      <text:p text:style-name="P1">Relieve the people of Bangladesh </text:p>
      <text:p text:style-name="P1">Bangladesh, Bangladesh </text:p>
      <text:p text:style-name="P1">Such a great disaster - I don't understand </text:p>
      <text:p text:style-name="P1">But it sure looks like a mess </text:p>
      <text:p text:style-name="P1">I've never known such distress </text:p>
      <text:p text:style-name="P1">Now, please don't turn away, I want to hear you say </text:p>
      <text:p text:style-name="P1">Relieve the people of Bangladesh </text:p>
      <text:p text:style-name="P1">Relieve Bangladesh</text:p>
      <text:p text:style-name="P1"><text:span text:style-name="T2">বাংলাদেশ আমার বন্ধু আমার কাছে এসেছিল</text:span>, <text:span text:style-name="T2">তার চোখে দুঃখ ছিল। সে আমাকে বলেছিল যে তার দেশ মারা যাওয়ার আগে সে সাহায্য চায়। যদিও আমি ব্যথা অনুভব করতে পারিনি</text:span>, <text:span text:style-name="T2">আমি জানতাম আমাকে চেষ্টা করতে হবে। এখন</text:span>, <text:span text:style-name="T2">আমি তোমাদের সকলকে অনুরোধ করছি আমাদের কিছু জীবন বাঁচাতে সাহায্য করুন</text:span>, <text:span text:style-name="T2">বাংলাদেশ যেখানে এত মানুষ দ্রুত মারা যাচ্ছে এবং এটা সত্যিই একটা জগাখিচুড়ির মতো দেখাচ্ছে আমি কখনও এত দুর্দশা দেখিনি। এখন</text:span>, <text:span text:style-name="T2">তোমরা কি তোমার হাত বাড়িয়ে দেবে না এবং বুঝতে পারবে না বাংলাদেশের মানুষকে সাহায্য করো</text:span>, <text:span text:style-name="T2">বাংলাদেশ এত বড় দুর্যোগ </text:span>- <text:span text:style-name="T2">আমি বুঝতে পারছি না কিন্তু এটা সত্যিই একটা জগাখিচুড়ির মতো দেখাচ্ছে। আমি কখনও এত দুর্দশা দেখিনি। এখন</text:span>, <text:span text:style-name="T2">দয়া করে মুখ ফিরিয়ে নিও না</text:span>, <text:span text:style-name="T2">আমি শুনতে চাই তুমি বলছো বাংলাদেশের মানুষকে সাহায্য করো</text:span>, <text:span text:style-name="T2">বাংলাদেশকে সাহায্য করো।</text:span></text:p>
      <text:p text:style-name="P2">Here are the answers to the 20 questions based on the provided poem:</text:p>
      <text:p text:style-name="P3"><text:span text:style-name="T3"><text:line-break/></text:span><text:span text:style-name="T2">প্রদত্ত কবিতার উপর ভিত্তি করে ২০টি প্রশ্নের উত্তর এখানে দেওয়া হল</text:span><text:span text:style-name="T3">:</text:span></text:p>
      <text:p text:style-name="P4"><text:line-break/><text:span text:style-name="T4">Section 1: Comprehension and Interpretation of the Poem</text:span></text:p>
      <text:list text:style-name="L1">
        <text:list-item>
          <text:p text:style-name="P5"><text:span text:style-name="Strong_20_Emphasis"><text:span text:style-name="T5">What is the central emotion expressed by the speaker's friend in the first stanza?</text:span></text:span><text:span text:style-name="T6"><text:line-break/>The central emotions are sadness and despair, as indicated by the description "with sadness in his eyes" and his feeling that his country is about to "die".</text:span></text:p>
          <text:p text:style-name="P6"><text:span text:style-name="Strong_20_Emphasis"><text:span text:style-name="T7">প্রথম স্তবকটিতে বক্তার বন্ধুর দ্বারা প্রকাশিত কেন্দ্রীয় আবেগ কী</text:span></text:span><text:span text:style-name="Strong_20_Emphasis"><text:span text:style-name="T8">?</text:span></text:span><text:span text:style-name="T9"><text:line-break/></text:span><text:span text:style-name="T10">কেন্দ্রীয় আবেগগুলি হল দুঃখ এবং হতাশা</text:span><text:span text:style-name="T9">, </text:span><text:span text:style-name="T10">যা </text:span><text:span text:style-name="T9">"</text:span><text:span text:style-name="T10">চোখে দুঃখ নিয়ে</text:span><text:span text:style-name="T9">" </text:span><text:span text:style-name="T10">বর্ণনা এবং তার দেশ </text:span><text:span text:style-name="T9">"</text:span><text:span text:style-name="T10">মৃত্যুর দিকে</text:span><text:span text:style-name="T9">" </text:span><text:span text:style-name="T10">যাওয়ার অনুভূতি দ্বারা নির্দেশিত।</text:span></text:p>
          <text:p text:style-name="P7"><text:soft-page-break/></text:p>
        </text:list-item>
        <text:list-item>
          <text:p text:style-name="P5"><text:span text:style-name="Strong_20_Emphasis"><text:span text:style-name="T5">How does the speaker describe their initial personal connection to the crisis described in the poem?</text:span></text:span><text:span text:style-name="T6"><text:line-break/>The speaker admits they initially "couldn't feel the pain" directly, acknowledging a degree of emotional distance, but recognized a moral imperative that they "had to try" to help.</text:span></text:p>
          <text:p text:style-name="P6"><text:span text:style-name="Strong_20_Emphasis"><text:span text:style-name="T7">কবিতায় বর্ণিত সংকটের সাথে তাদের প্রাথমিক ব্যক্তিগত সংযোগের বর্ণনা বক্তা কীভাবে দিয়েছেন</text:span></text:span><text:span text:style-name="Strong_20_Emphasis"><text:span text:style-name="T8">?</text:span></text:span><text:span text:style-name="T9"><text:line-break/></text:span><text:span text:style-name="T10">বক্তা স্বীকার করেছেন যে তারা প্রথমে </text:span><text:span text:style-name="T9">"</text:span><text:span text:style-name="T10">ব্যথা সরাসরি অনুভব করতে পারেননি</text:span><text:span text:style-name="T9">", </text:span><text:span text:style-name="T10">কিছুটা মানসিক দূরত্ব স্বীকার করে</text:span><text:span text:style-name="T9">, </text:span><text:span text:style-name="T10">কিন্তু একটি নৈতিক বাধ্যবাধকতা স্বীকার করেছেন যা তাদের সাহায্য করার জন্য </text:span><text:span text:style-name="T9">"</text:span><text:span text:style-name="T10">চেষ্টা করতে হয়েছিল</text:span><text:span text:style-name="T9">"</text:span><text:span text:style-name="T10">।</text:span></text:p>
          <text:p text:style-name="P7"/>
        </text:list-item>
        <text:list-item>
          <text:p text:style-name="P5"><text:span text:style-name="Strong_20_Emphasis"><text:span text:style-name="T5">What specific words or phrases does the poet use to convey the severity of the situation in Bangladesh? (List at least three examples).</text:span></text:span><text:span text:style-name="T6"><text:line-break/>Examples include: "Before his country dies," "so many people are dying fast," "a mess," "great disaster," and "such distress."</text:span></text:p>
          <text:p text:style-name="P6"><text:span text:style-name="Strong_20_Emphasis"><text:span text:style-name="T7">বাংলাদেশের পরিস্থিতির তীব্রতা বোঝাতে কবি কোন নির্দিষ্ট শব্দ বা বাক্যাংশ ব্যবহার করেছেন</text:span></text:span><text:span text:style-name="Strong_20_Emphasis"><text:span text:style-name="T8">? (</text:span></text:span><text:span text:style-name="Strong_20_Emphasis"><text:span text:style-name="T7">কমপক্ষে তিনটি উদাহরণের তালিকা দিন</text:span></text:span><text:span text:style-name="Strong_20_Emphasis"><text:span text:style-name="T8">)</text:span></text:span><text:span text:style-name="Strong_20_Emphasis"><text:span text:style-name="T7">।</text:span></text:span><text:span text:style-name="T9"><text:line-break/></text:span><text:span text:style-name="T10">উদাহরণের মধ্যে রয়েছে</text:span><text:span text:style-name="T9">: "</text:span><text:span text:style-name="T10">তার দেশ মারা যাওয়ার আগে</text:span><text:span text:style-name="T9">," "</text:span><text:span text:style-name="T10">এত মানুষ দ্রুত মারা যাচ্ছে</text:span><text:span text:style-name="T9">," "</text:span><text:span text:style-name="T10">একটি বিশৃঙ্খলা</text:span><text:span text:style-name="T9">," "</text:span><text:span text:style-name="T10">মহা বিপর্যয়</text:span><text:span text:style-name="T9">," </text:span><text:span text:style-name="T10">এবং </text:span><text:span text:style-name="T9">"</text:span><text:span text:style-name="T10">এত দুর্দশা।</text:span><text:span text:style-name="T9">"</text:span></text:p>
          <text:p text:style-name="P7"/>
        </text:list-item>
        <text:list-item>
          <text:p text:style-name="P5"><text:span text:style-name="Strong_20_Emphasis"><text:span text:style-name="T5">In the third stanza, the speaker shifts from a plea to others. What exactly are they asking "all of you" to do?</text:span></text:span><text:span text:style-name="T6"><text:line-break/>The speaker asks "all of you" to "lend your hand," "understand," and "Relieve the people of Bangladesh" to "save some lives."</text:span></text:p>
          <text:p text:style-name="P6"><text:span text:style-name="Strong_20_Emphasis"><text:span text:style-name="T7">তৃতীয় স্তবকটিতে</text:span></text:span><text:span text:style-name="Strong_20_Emphasis"><text:span text:style-name="T8">, </text:span></text:span><text:span text:style-name="Strong_20_Emphasis"><text:span text:style-name="T7">বক্তা অন্যদের কাছে আবেদনের পরিবর্তে অন্যদের কাছে আবেদন করছেন। তারা </text:span></text:span><text:span text:style-name="Strong_20_Emphasis"><text:span text:style-name="T8">"</text:span></text:span><text:span text:style-name="Strong_20_Emphasis"><text:span text:style-name="T7">তোমাদের সকলকে</text:span></text:span><text:span text:style-name="Strong_20_Emphasis"><text:span text:style-name="T8">" </text:span></text:span><text:span text:style-name="Strong_20_Emphasis"><text:span text:style-name="T7">ঠিক কী করতে বলছেন</text:span></text:span><text:span text:style-name="Strong_20_Emphasis"><text:span text:style-name="T8">?</text:span></text:span><text:span text:style-name="T9"><text:line-break/></text:span><text:span text:style-name="T10">বক্তা </text:span><text:span text:style-name="T9">"</text:span><text:span text:style-name="T10">তোমাদের সকলকে</text:span><text:span text:style-name="T9">" "</text:span><text:span text:style-name="T10">হাত বাড়াতে</text:span><text:span text:style-name="T9">", "</text:span><text:span text:style-name="T10">বুঝতে</text:span><text:span text:style-name="T9">" </text:span><text:span text:style-name="T10">এবং </text:span><text:span text:style-name="T9">"</text:span><text:span text:style-name="T10">কিছু জীবন বাঁচাতে</text:span><text:span text:style-name="T9">" "</text:span><text:span text:style-name="T10">বাংলাদেশের মানুষকে সাহায্য করতে</text:span><text:span text:style-name="T9">" </text:span><text:span text:style-name="T10">অনুরোধ করছেন।</text:span></text:p>
        </text:list-item>
        <text:list-item>
          <text:p text:style-name="P5"><text:span text:style-name="Strong_20_Emphasis"><text:span text:style-name="T5">What repeated lines in the final stanza emphasize the urgency of the situation?</text:span></text:span><text:span text:style-name="T6"><text:line-break/>The lines "Relieve the people of Bangladesh" and "Relieve Bangladesh" are repeated, serving as an urgent refrain or call to action.</text:span></text:p>
          <text:p text:style-name="P6"><text:soft-page-break/><text:span text:style-name="Strong_20_Emphasis"><text:span text:style-name="T7">শেষ স্তবকের কোন পংক্তিগুলো পরিস্থিতির জরুরিতাকে জোর দেয়</text:span></text:span><text:span text:style-name="Strong_20_Emphasis"><text:span text:style-name="T8">?</text:span></text:span><text:span text:style-name="T9"><text:line-break/>"</text:span><text:span text:style-name="T10">বাংলাদেশের জনগণকে স্বস্তি দিন</text:span><text:span text:style-name="T9">" </text:span><text:span text:style-name="T10">এবং </text:span><text:span text:style-name="T9">"</text:span><text:span text:style-name="T10">বাংলাদেশকে স্বস্তি দিন</text:span><text:span text:style-name="T9">" </text:span><text:span text:style-name="T10">পংক্তিগুলো পুনরাবৃত্তি করা হয়েছে</text:span><text:span text:style-name="T9">, </text:span><text:span text:style-name="T10">যা জরুরি প্রত্যাহার বা পদক্ষেপ নেওয়ার আহ্বান হিসেবে কাজ করে।</text:span></text:p>
          <text:p text:style-name="P7"/>
        </text:list-item>
        <text:list-item>
          <text:p text:style-name="P5"><text:span text:style-name="Strong_20_Emphasis"><text:span text:style-name="T5">The speaker notes they have "never known such distress" and have "never seen such distress". What does this imply about the magnitude of the disaster being described?</text:span></text:span><text:span text:style-name="T6"><text:line-break/>It implies that the disaster is unprecedented and overwhelming in its scale, surpassing any previous experience the speaker has had with suffering.</text:span></text:p>
          <text:p text:style-name="P6"><text:span text:style-name="Strong_20_Emphasis"><text:span text:style-name="T7">বক্তা উল্লেখ করেন যে তারা </text:span></text:span><text:span text:style-name="Strong_20_Emphasis"><text:span text:style-name="T8">"</text:span></text:span><text:span text:style-name="Strong_20_Emphasis"><text:span text:style-name="T7">এমন দুর্দশা কখনও দেখেননি</text:span></text:span><text:span text:style-name="Strong_20_Emphasis"><text:span text:style-name="T8">" </text:span></text:span><text:span text:style-name="Strong_20_Emphasis"><text:span text:style-name="T7">এবং </text:span></text:span><text:span text:style-name="Strong_20_Emphasis"><text:span text:style-name="T8">"</text:span></text:span><text:span text:style-name="Strong_20_Emphasis"><text:span text:style-name="T7">এমন দুর্দশা কখনও দেখেননি</text:span></text:span><text:span text:style-name="Strong_20_Emphasis"><text:span text:style-name="T8">"</text:span></text:span><text:span text:style-name="Strong_20_Emphasis"><text:span text:style-name="T7">। বর্ণিত দুর্যোগের মাত্রা সম্পর্কে এর অর্থ কী</text:span></text:span><text:span text:style-name="Strong_20_Emphasis"><text:span text:style-name="T8">?</text:span></text:span><text:span text:style-name="T9"><text:line-break/></text:span><text:span text:style-name="T10">এর অর্থ হল এই দুর্যোগটি অভূতপূর্ব এবং বিশাল</text:span><text:span text:style-name="T9">, </text:span><text:span text:style-name="T10">যা বক্তার দুর্ভোগের পূর্ববর্তী যেকোনো অভিজ্ঞতাকে ছাড়িয়ে গেছে।</text:span></text:p>
        </text:list-item>
        <text:list-item>
          <text:p text:style-name="P8"><text:span text:style-name="Strong_20_Emphasis"><text:span text:style-name="T5">What is the tone of the poem? (e.g., despairing, hopeful, urgent, informational).</text:span></text:span><text:span text:style-name="T6"><text:line-break/>The tone is primarily </text:span><text:span text:style-name="Strong_20_Emphasis"><text:span text:style-name="T5">urgent</text:span></text:span><text:span text:style-name="T6"> and </text:span><text:span text:style-name="Strong_20_Emphasis"><text:span text:style-name="T5">pleading</text:span></text:span><text:span text:style-name="T6">, with strong undertones of </text:span><text:span text:style-name="Strong_20_Emphasis"><text:span text:style-name="T5">distress</text:span></text:span><text:span text:style-name="T6"> and a touch of </text:span><text:span text:style-name="Strong_20_Emphasis"><text:span text:style-name="T5">hopefulness</text:span></text:span><text:span text:style-name="T6"> in the call for action.</text:span></text:p>
          <text:p text:style-name="P8"><text:span text:style-name="Strong_20_Emphasis"><text:span text:style-name="T11">কবিতাটির সুর কী</text:span></text:span><text:span text:style-name="Strong_20_Emphasis"><text:span text:style-name="T12">? (</text:span></text:span><text:span text:style-name="Strong_20_Emphasis"><text:span text:style-name="T11">যেমন</text:span></text:span><text:span text:style-name="Strong_20_Emphasis"><text:span text:style-name="T12">, </text:span></text:span><text:span text:style-name="Strong_20_Emphasis"><text:span text:style-name="T11">হতাশাজনক</text:span></text:span><text:span text:style-name="Strong_20_Emphasis"><text:span text:style-name="T12">, </text:span></text:span><text:span text:style-name="Strong_20_Emphasis"><text:span text:style-name="T11">আশাবাদী</text:span></text:span><text:span text:style-name="Strong_20_Emphasis"><text:span text:style-name="T12">, </text:span></text:span><text:span text:style-name="Strong_20_Emphasis"><text:span text:style-name="T11">জরুরি</text:span></text:span><text:span text:style-name="Strong_20_Emphasis"><text:span text:style-name="T12">, </text:span></text:span><text:span text:style-name="Strong_20_Emphasis"><text:span text:style-name="T11">তথ্যবহুল</text:span></text:span><text:span text:style-name="Strong_20_Emphasis"><text:span text:style-name="T12">)</text:span></text:span><text:span text:style-name="Strong_20_Emphasis"><text:span text:style-name="T11">।</text:span></text:span><text:span text:style-name="T13"><text:line-break/></text:span><text:span text:style-name="T14">সুরটি মূলত </text:span><text:span text:style-name="Strong_20_Emphasis"><text:span text:style-name="T11">জরুরি</text:span></text:span><text:span text:style-name="T14"> এবং </text:span><text:span text:style-name="Strong_20_Emphasis"><text:span text:style-name="T11">অনুনয়মূলক</text:span></text:span><text:span text:style-name="T14"> </text:span><text:span text:style-name="T13">, </text:span><text:span text:style-name="T14">যেখানে তীব্র </text:span><text:span text:style-name="Strong_20_Emphasis"><text:span text:style-name="T11">যন্ত্রণার</text:span></text:span><text:span text:style-name="T14"> আভাস এবং কর্মের আহ্বানে </text:span><text:span text:style-name="Strong_20_Emphasis"><text:span text:style-name="T11">আশার</text:span></text:span><text:span text:style-name="T14"> ছোঁয়া রয়েছে ।</text:span></text:p>
        </text:list-item>
      </text:list>
      <text:p text:style-name="P9">Section 2: Themes and Emotional Response</text:p>
      <text:list text:style-name="L2">
        <text:list-item>
          <text:p text:style-name="P10"><text:span text:style-name="Strong_20_Emphasis"><text:span text:style-name="T5">The speaker admits, "Although I couldn't feel the pain, I knew I had to try". What theme is this line introducing regarding human connection and responsibility?</text:span></text:span><text:span text:style-name="T6"><text:line-break/>This line introduces the theme of moral or global responsibility—that understanding a crisis intellectually can be enough motivation to act, even without direct personal or emotional experience of the suffering. Empathy can be cultivated through awareness.</text:span></text:p>
          <text:p text:style-name="P11"><text:span text:style-name="Strong_20_Emphasis"><text:span text:style-name="T7">বক্তা স্বীকার করেন</text:span></text:span><text:span text:style-name="Strong_20_Emphasis"><text:span text:style-name="T8">, "</text:span></text:span><text:span text:style-name="Strong_20_Emphasis"><text:span text:style-name="T7">যদিও আমি ব্যথা অনুভব করতে পারিনি</text:span></text:span><text:span text:style-name="Strong_20_Emphasis"><text:span text:style-name="T8">, </text:span></text:span><text:span text:style-name="Strong_20_Emphasis"><text:span text:style-name="T7">আমি জানতাম আমাকে চেষ্টা করতে হবে</text:span></text:span><text:span text:style-name="Strong_20_Emphasis"><text:span text:style-name="T8">"</text:span></text:span><text:span text:style-name="Strong_20_Emphasis"><text:span text:style-name="T7">। এই লাইনটি মানব সংযোগ এবং দায়িত্ব সম্পর্কে কোন থিমটি উপস্থাপন করছে</text:span></text:span><text:span text:style-name="Strong_20_Emphasis"><text:span text:style-name="T8">?</text:span></text:span><text:span text:style-name="T9"><text:line-break/></text:span><text:span text:style-name="T10">এই লাইনটি নৈতিক বা বিশ্বব্যাপী দায়িত্বের থিমটি উপস্থাপন করে </text:span><text:span text:style-name="T9">- </text:span><text:span text:style-name="T10">যে বৌদ্ধিকভাবে একটি সংকট বোঝা কষ্টের সরাসরি ব্যক্তিগত বা মানসিক অভিজ্ঞতা ছাড়াই কাজ করার জন্য যথেষ্ট প্রেরণা হতে পারে। সচেতনতার মাধ্যমে সহানুভূতি গড়ে তোলা যেতে পারে।</text:span></text:p>
        </text:list-item>
        <text:list-item>
          <text:p text:style-name="P12"><text:soft-page-break/><text:span text:style-name="Strong_20_Emphasis"><text:span text:style-name="T5">How does the poem attempt to build a sense of urgency and global responsibility in the reader?</text:span></text:span><text:span text:style-name="T6"><text:line-break/>It uses direct address ("Now, I'm asking all of you"), powerful imagery ("dying fast," "great disaster"), and a direct plea not to "turn away," making the reader feel personally responsible for the outcome.</text:span></text:p>
          <text:p text:style-name="P12"><text:span text:style-name="Strong_20_Emphasis"><text:span text:style-name="T11">কবিতাটি পাঠকের মধ্যে জরুরিতা এবং বিশ্বব্যাপী দায়িত্ববোধ তৈরি করার চেষ্টা করে কীভাবে</text:span></text:span><text:span text:style-name="Strong_20_Emphasis"><text:span text:style-name="T12">?</text:span></text:span><text:span text:style-name="T13"><text:line-break/></text:span><text:span text:style-name="T14">এতে সরাসরি সম্বোধন </text:span><text:span text:style-name="T13">("</text:span><text:span text:style-name="T14">এখন</text:span><text:span text:style-name="T13">, </text:span><text:span text:style-name="T14">আমি তোমাদের সকলকে জিজ্ঞাসা করছি</text:span><text:span text:style-name="T13">"), </text:span><text:span text:style-name="T14">শক্তিশালী চিত্রকল্প </text:span><text:span text:style-name="T13">("</text:span><text:span text:style-name="T14">দ্রুত মৃত্যু</text:span><text:span text:style-name="T13">," "</text:span><text:span text:style-name="T14">মহা বিপর্যয়</text:span><text:span text:style-name="T13">"), </text:span><text:span text:style-name="T14">এবং </text:span><text:span text:style-name="T13">"</text:span><text:span text:style-name="T14">মুখ ফিরিয়ে না নেওয়ার</text:span><text:span text:style-name="T13">" </text:span><text:span text:style-name="T14">সরাসরি আবেদন ব্যবহার করা হয়েছে</text:span><text:span text:style-name="T13">, </text:span><text:span text:style-name="T14">যাতে পাঠক ফলাফলের জন্য ব্যক্তিগতভাবে দায়ী বোধ করেন।</text:span></text:p>
        </text:list-item>
        <text:list-item>
          <text:p text:style-name="P10"><text:span text:style-name="Strong_20_Emphasis"><text:span text:style-name="T5">The poem uses simple language. How does this choice affect its message?</text:span></text:span><text:span text:style-name="T6"><text:line-break/>The simple, direct language makes the message universally accessible and easy to understand, cutting through complexity to reach a wider audience quickly. It mimics a heartfelt, urgent plea rather than a formal, academic report.</text:span></text:p>
          <text:p text:style-name="P13"><text:span text:style-name="Strong_20_Emphasis"><text:span text:style-name="T7">কবিতাটিতে সহজ ভাষা ব্যবহার করা হয়েছে। এই পছন্দটি এর বার্তাকে কীভাবে প্রভাবিত করে</text:span></text:span><text:span text:style-name="Strong_20_Emphasis"><text:span text:style-name="T8">?</text:span></text:span><text:span text:style-name="T9"><text:line-break/></text:span><text:span text:style-name="T10">সরল</text:span><text:span text:style-name="T9">, </text:span><text:span text:style-name="T10">সরাসরি ভাষা বার্তাটিকে সর্বজনীনভাবে সহজলভ্য এবং বোধগম্য করে তোলে</text:span><text:span text:style-name="T9">, </text:span><text:span text:style-name="T10">জটিলতা ভেদ করে দ্রুত বৃহত্তর শ্রোতাদের কাছে পৌঁছায়। এটি একটি আনুষ্ঠানিক</text:span><text:span text:style-name="T9">, </text:span><text:span text:style-name="T10">একাডেমিক প্রতিবেদনের পরিবর্তে একটি আন্তরিক</text:span><text:span text:style-name="T9">, </text:span><text:span text:style-name="T10">জরুরি আবেদনের অনুকরণ করে।</text:span></text:p>
        </text:list-item>
        <text:list-item>
          <text:p text:style-name="P10"><text:span text:style-name="Strong_20_Emphasis"><text:span text:style-name="T5">What is the speaker's main goal in sharing this story with a wider audience?</text:span></text:span><text:span text:style-name="T6"><text:line-break/>The main goal is to raise awareness about the "disaster" in Bangladesh and motivate the audience to provide tangible help or "relief" to save lives.</text:span></text:p>
          <text:p text:style-name="P13"><text:span text:style-name="Strong_20_Emphasis"><text:span text:style-name="T7">এই গল্পটি আরও বিস্তৃত শ্রোতাদের সাথে ভাগ করে নেওয়ার ক্ষেত্রে বক্তার মূল লক্ষ্য কী</text:span></text:span><text:span text:style-name="Strong_20_Emphasis"><text:span text:style-name="T8">?</text:span></text:span><text:span text:style-name="T9"><text:line-break/></text:span><text:span text:style-name="T10">মূল লক্ষ্য হল বাংলাদেশের </text:span><text:span text:style-name="T9">"</text:span><text:span text:style-name="T10">দুর্যোগ</text:span><text:span text:style-name="T9">" </text:span><text:span text:style-name="T10">সম্পর্কে সচেতনতা বৃদ্ধি করা এবং জীবন বাঁচাতে বাস্তব সাহায্য বা </text:span><text:span text:style-name="T9">"</text:span><text:span text:style-name="T10">ত্রাণ</text:span><text:span text:style-name="T9">" </text:span><text:span text:style-name="T10">প্রদানে শ্রোতাদের অনুপ্রাণিত করা।</text:span></text:p>
        </text:list-item>
        <text:list-item>
          <text:p text:style-name="P10"><text:span text:style-name="Strong_20_Emphasis"><text:span text:style-name="T5">How does the poem differentiate between "feeling the pain" and "knowing" about the problem?</text:span></text:span><text:span text:style-name="T6"><text:line-break/>"Feeling the pain" refers to direct, personal, emotional experience of the suffering (which the friend has, and the speaker lacks). "Knowing" refers to intellectual awareness and acknowledgment of the crisis, which is enough to prompt action ("knew I had to try").</text:span></text:p>
          <text:p text:style-name="P14"><text:span text:style-name="Strong_20_Emphasis"><text:span text:style-name="T7">কবিতাটি </text:span></text:span><text:span text:style-name="Strong_20_Emphasis"><text:span text:style-name="T8">"</text:span></text:span><text:span text:style-name="Strong_20_Emphasis"><text:span text:style-name="T7">ব্যথা অনুভব করা</text:span></text:span><text:span text:style-name="Strong_20_Emphasis"><text:span text:style-name="T8">" </text:span></text:span><text:span text:style-name="Strong_20_Emphasis"><text:span text:style-name="T7">এবং সমস্যা সম্পর্কে </text:span></text:span><text:span text:style-name="Strong_20_Emphasis"><text:span text:style-name="T8">"</text:span></text:span><text:span text:style-name="Strong_20_Emphasis"><text:span text:style-name="T7">জ্ঞান</text:span></text:span><text:span text:style-name="Strong_20_Emphasis"><text:span text:style-name="T8">" </text:span></text:span><text:span text:style-name="Strong_20_Emphasis"><text:span text:style-name="T7">এর মধ্যে কীভাবে পার্থক্য করে</text:span></text:span><text:span text:style-name="Strong_20_Emphasis"><text:span text:style-name="T8">?</text:span></text:span><text:span text:style-name="T9"><text:line-break/>"</text:span><text:span text:style-name="T10">ব্যথা অনুভব করা</text:span><text:span text:style-name="T9">" </text:span><text:span text:style-name="T10">বলতে দুঃখকষ্টের প্রত্যক্ষ</text:span><text:span text:style-name="T9">, </text:span><text:span text:style-name="T10">ব্যক্তিগত</text:span><text:span text:style-name="T9">, </text:span><text:span text:style-name="T10">মানসিক অভিজ্ঞতা বোঝায় </text:span><text:span text:style-name="T9">(</text:span><text:span text:style-name="T10">যা বন্ধুর আছে</text:span><text:span text:style-name="T9">, </text:span><text:span text:style-name="T10">এবং বক্তার নেই</text:span><text:span text:style-name="T9">)</text:span><text:span text:style-name="T10">। </text:span><text:span text:style-name="T9">"</text:span><text:span text:style-name="T10">জ্ঞান</text:span><text:span text:style-name="T9">" </text:span><text:span text:style-name="T10">বলতে বৌদ্ধিক সচেতনতা এবং সংকটের স্বীকৃতি বোঝায়</text:span><text:span text:style-name="T9">, </text:span><text:span text:style-name="T10">যা দ্রুত পদক্ষেপ নেওয়ার জন্য যথেষ্ট </text:span><text:span text:style-name="T9">("</text:span><text:span text:style-name="T10">জানতাম আমাকে চেষ্টা করতে হবে</text:span><text:span text:style-name="T9">")</text:span><text:span text:style-name="T10">।</text:span></text:p>
        </text:list-item>
      </text:list>
      <text:p text:style-name="P15"><text:soft-page-break/>Section 3: Context and Historical/Social Relevance <text:span text:style-name="T15">বিভাগ ৩</text:span><text:span text:style-name="T16">: </text:span><text:span text:style-name="T15">প্রেক্ষাপট এবং ঐতিহাসিক</text:span><text:span text:style-name="T16">/</text:span><text:span text:style-name="T15">সামাজিক প্রাসঙ্গিকতা</text:span></text:p>
      <text:list text:style-name="L3">
        <text:list-item>
          <text:p text:style-name="P16"><text:span text:style-name="Strong_20_Emphasis"><text:span text:style-name="T5">The poem refers to a "great disaster" in Bangladesh. Without searching for a specific event, what kinds of natural disasters is Bangladesh often vulnerable to that might cause the "distress" mentioned?</text:span></text:span><text:span text:style-name="T6"><text:line-break/>Bangladesh is geographically vulnerable to significant natural disasters, including severe flooding, tropical cyclones (which often cause massive storm surges), and the resulting famine or disease outbreaks.</text:span></text:p>
          <text:p text:style-name="P17"><text:span text:style-name="Strong_20_Emphasis"><text:span text:style-name="T7">কবিতাটিতে বাংলাদেশের একটি </text:span></text:span><text:span text:style-name="Strong_20_Emphasis"><text:span text:style-name="T8">"</text:span></text:span><text:span text:style-name="Strong_20_Emphasis"><text:span text:style-name="T7">মহা বিপর্যয়ের</text:span></text:span><text:span text:style-name="Strong_20_Emphasis"><text:span text:style-name="T8">" </text:span></text:span><text:span text:style-name="Strong_20_Emphasis"><text:span text:style-name="T7">কথা বলা হয়েছে। নির্দিষ্ট কোনও ঘটনার সন্ধান না করেই বলা হয়েছে যে</text:span></text:span><text:span text:style-name="Strong_20_Emphasis"><text:span text:style-name="T8">, </text:span></text:span><text:span text:style-name="Strong_20_Emphasis"><text:span text:style-name="T7">বাংলাদেশ প্রায়শই কোন ধরণের প্রাকৃতিক দুর্যোগের ঝুঁকিতে থাকে যা উল্লেখিত </text:span></text:span><text:span text:style-name="Strong_20_Emphasis"><text:span text:style-name="T8">"</text:span></text:span><text:span text:style-name="Strong_20_Emphasis"><text:span text:style-name="T7">দুর্দশার</text:span></text:span><text:span text:style-name="Strong_20_Emphasis"><text:span text:style-name="T8">" </text:span></text:span><text:span text:style-name="Strong_20_Emphasis"><text:span text:style-name="T7">কারণ হতে পারে</text:span></text:span><text:span text:style-name="Strong_20_Emphasis"><text:span text:style-name="T8">?</text:span></text:span><text:span text:style-name="T9"><text:line-break/></text:span><text:span text:style-name="T10">ভৌগোলিকভাবে বাংলাদেশ উল্লেখযোগ্য প্রাকৃতিক দুর্যোগের ঝুঁকিতে রয়েছে</text:span><text:span text:style-name="T9">, </text:span><text:span text:style-name="T10">যার মধ্যে রয়েছে তীব্র বন্যা</text:span><text:span text:style-name="T9">, </text:span><text:span text:style-name="T10">গ্রীষ্মমন্ডলীয় ঘূর্ণিঝড় </text:span><text:span text:style-name="T9">(</text:span><text:span text:style-name="T10">যা প্রায়শই বিশাল ঝড়ের সৃষ্টি করে</text:span><text:span text:style-name="T9">), </text:span><text:span text:style-name="T10">এবং এর ফলে সৃষ্ট দুর্ভিক্ষ বা রোগের প্রাদুর্ভাব।</text:span></text:p>
        </text:list-item>
        <text:list-item>
          <text:p text:style-name="P16"><text:span text:style-name="Strong_20_Emphasis"><text:span text:style-name="T5">How does the poem serve as a call to action?</text:span></text:span><text:span text:style-name="T6"><text:line-break/>The poem directly asks readers to perform specific actions: "lend your hand," "understand," and "Relieve the people of Bangladesh," explicitly calling for intervention and aid.</text:span></text:p>
          <text:p text:style-name="P17"><text:span text:style-name="Strong_20_Emphasis"><text:span text:style-name="T7">কবিতাটি কীভাবে কর্মের আহ্বান হিসেবে কাজ করে</text:span></text:span><text:span text:style-name="Strong_20_Emphasis"><text:span text:style-name="T8">?</text:span></text:span><text:span text:style-name="T9"><text:line-break/></text:span><text:span text:style-name="T10">কবিতাটি সরাসরি পাঠকদের নির্দিষ্ট কিছু পদক্ষেপ নিতে বলে</text:span><text:span text:style-name="T9">: "</text:span><text:span text:style-name="T10">আপনার হাত ধার দিন</text:span><text:span text:style-name="T9">," "</text:span><text:span text:style-name="T10">বুঝুন</text:span><text:span text:style-name="T9">" </text:span><text:span text:style-name="T10">এবং </text:span><text:span text:style-name="T9">"</text:span><text:span text:style-name="T10">বাংলাদেশের জনগণকে স্বস্তি দিন</text:span><text:span text:style-name="T9">", </text:span><text:span text:style-name="T10">স্পষ্টভাবে হস্তক্ষেপ এবং সাহায্যের আহ্বান।</text:span></text:p>
        </text:list-item>
        <text:list-item>
          <text:p text:style-name="P16"><text:span text:style-name="Strong_20_Emphasis"><text:span text:style-name="T5">If this poem were written during a specific historical event (like a major flood or famine), how would that context deepen our understanding of the lines "people are dying fast" and "looks like a mess"?</text:span></text:span><text:span text:style-name="T6"><text:line-break/>Specific context would lend historical gravity and factual weight to the emotional plea. It would confirm that the poem is not hypothetical but a direct response to a real, immediate, life-threatening crisis, making the language literal rather than just poetic hyperbole.</text:span></text:p>
          <text:p text:style-name="P17"><text:span text:style-name="Strong_20_Emphasis"><text:span text:style-name="T7">যদি এই কবিতাটি একটি নির্দিষ্ট ঐতিহাসিক ঘটনার </text:span></text:span><text:span text:style-name="Strong_20_Emphasis"><text:span text:style-name="T8">(</text:span></text:span><text:span text:style-name="Strong_20_Emphasis"><text:span text:style-name="T7">যেমন একটি বড় বন্যা বা দুর্ভিক্ষ</text:span></text:span><text:span text:style-name="Strong_20_Emphasis"><text:span text:style-name="T8">) </text:span></text:span><text:span text:style-name="Strong_20_Emphasis"><text:span text:style-name="T7">সময় লেখা হত</text:span></text:span><text:span text:style-name="Strong_20_Emphasis"><text:span text:style-name="T8">, </text:span></text:span><text:span text:style-name="Strong_20_Emphasis"><text:span text:style-name="T7">তাহলে সেই প্রেক্ষাপট </text:span></text:span><text:span text:style-name="Strong_20_Emphasis"><text:span text:style-name="T8">"</text:span></text:span><text:span text:style-name="Strong_20_Emphasis"><text:span text:style-name="T7">মানুষ দ্রুত মারা যাচ্ছে</text:span></text:span><text:span text:style-name="Strong_20_Emphasis"><text:span text:style-name="T8">" </text:span></text:span><text:span text:style-name="Strong_20_Emphasis"><text:span text:style-name="T7">এবং </text:span></text:span><text:span text:style-name="Strong_20_Emphasis"><text:span text:style-name="T8">"</text:span></text:span><text:span text:style-name="Strong_20_Emphasis"><text:span text:style-name="T7">একটি বিশৃঙ্খলার মতো দেখাচ্ছে</text:span></text:span><text:span text:style-name="Strong_20_Emphasis"><text:span text:style-name="T8">" </text:span></text:span><text:span text:style-name="Strong_20_Emphasis"><text:span text:style-name="T7">এই লাইনগুলি সম্পর্কে আমাদের ধারণাকে কীভাবে আরও গভীর করবে</text:span></text:span><text:span text:style-name="Strong_20_Emphasis"><text:span text:style-name="T8">?</text:span></text:span><text:span text:style-name="T9"><text:line-break/></text:span><text:span text:style-name="T10">নির্দিষ্ট প্রেক্ষাপট আবেগগত আবেদনকে ঐতিহাসিক গুরুত্ব এবং বাস্তবিক গুরুত্ব দেবে। এটি নিশ্চিত করবে যে কবিতাটি কাল্পনিক নয় বরং একটি বাস্তব</text:span><text:span text:style-name="T9">, </text:span><text:span text:style-name="T10">তাৎক্ষণিক</text:span><text:span text:style-name="T9">, </text:span><text:span text:style-name="T10">জীবন</text:span><text:span text:style-name="T9">-</text:span><text:span text:style-name="T10">হুমকির সংকটের সরাসরি প্রতিক্রিয়া</text:span><text:span text:style-name="T9">, </text:span><text:span text:style-name="T10">যা ভাষাকে কেবল কাব্যিক অতিরঞ্জনের পরিবর্তে আক্ষরিক করে তোলে।</text:span></text:p>
        </text:list-item>
        <text:list-item>
          <text:p text:style-name="P16"><text:soft-page-break/><text:span text:style-name="Strong_20_Emphasis"><text:span text:style-name="T5">The poem emphasizes a need for international understanding and aid. What global organizations are typically involved in providing "relief" in such situations?</text:span></text:span><text:span text:style-name="T6"><text:line-break/>Organizations commonly involved include the Red Cross/Red Crescent, UNICEF, the World Food Programme (WFP), Doctors Without Borders (MSF), and various national aid agencies (e.g., USAID, UKAid).</text:span></text:p>
          <text:p text:style-name="P16"><text:span text:style-name="Strong_20_Emphasis"><text:span text:style-name="T11">কবিতাটি আন্তর্জাতিক বোঝাপড়া এবং সাহায্যের প্রয়োজনীয়তার উপর জোর দেয়। এই ধরনের পরিস্থিতিতে </text:span></text:span><text:span text:style-name="Strong_20_Emphasis"><text:span text:style-name="T12">"</text:span></text:span><text:span text:style-name="Strong_20_Emphasis"><text:span text:style-name="T11">ত্রাণ</text:span></text:span><text:span text:style-name="Strong_20_Emphasis"><text:span text:style-name="T12">" </text:span></text:span><text:span text:style-name="Strong_20_Emphasis"><text:span text:style-name="T11">প্রদানে সাধারণত কোন বিশ্বব্যাপী সংস্থাগুলি জড়িত থাকে</text:span></text:span><text:span text:style-name="Strong_20_Emphasis"><text:span text:style-name="T12">?</text:span></text:span><text:span text:style-name="T13"><text:line-break/></text:span><text:span text:style-name="T14">সাধারণত জড়িত সংস্থাগুলির মধ্যে রয়েছে রেড ক্রস</text:span><text:span text:style-name="T13">/</text:span><text:span text:style-name="T14">রেড ক্রিসেন্ট</text:span><text:span text:style-name="T13">, </text:span><text:span text:style-name="T14">ইউনিসেফ</text:span><text:span text:style-name="T13">, </text:span><text:span text:style-name="T14">ওয়ার্ল্ড ফুড প্রোগ্রাম </text:span><text:span text:style-name="T13">(</text:span><text:span text:style-name="T14">ডব্লিউএফপি</text:span><text:span text:style-name="T13">), </text:span><text:span text:style-name="T14">ডক্টরস উইদাউট বর্ডারস </text:span><text:span text:style-name="T13">(</text:span><text:span text:style-name="T14">এমএসএফ</text:span><text:span text:style-name="T13">) </text:span><text:span text:style-name="T14">এবং বিভিন্ন জাতীয় সাহায্য সংস্থা </text:span><text:span text:style-name="T13">(</text:span><text:span text:style-name="T14">যেমন</text:span><text:span text:style-name="T13">, </text:span><text:span text:style-name="T14">ইউএসএআইডি</text:span><text:span text:style-name="T13">, </text:span><text:span text:style-name="T14">ইউকেএইড</text:span><text:span text:style-name="T13">)</text:span><text:span text:style-name="T14">।</text:span></text:p>
        </text:list-item>
      </text:list>
      <text:p text:style-name="P18"><text:span text:style-name="T4">Section 4: Creative and Critical Thinking </text:span><text:span text:style-name="T15">বিভাগ ৪</text:span><text:span text:style-name="T17">: </text:span><text:span text:style-name="T15">সৃজনশীল এবং সমালোচনামূলক চিন্তাভাবনা</text:span></text:p>
      <text:list text:style-name="L4">
        <text:list-item>
          <text:p text:style-name="P19"><text:span text:style-name="Strong_20_Emphasis"><text:span text:style-name="T5">If you were the friend described in the poem, what specific information would you share with the speaker to make them "feel the pain"?</text:span></text:span><text:span text:style-name="T6"><text:line-break/>(Student answers will vary) A possible answer: I would show them photographs of submerged villages, describe the lack of clean drinking water, and share stories of families separated or starving due to the disaster's aftermath.</text:span></text:p>
          <text:p text:style-name="P20"><text:span text:style-name="Strong_20_Emphasis"><text:span text:style-name="T7">যদি তুমি কবিতায় বর্ণিত বন্ধু হতে</text:span></text:span><text:span text:style-name="Strong_20_Emphasis"><text:span text:style-name="T8">, </text:span></text:span><text:span text:style-name="Strong_20_Emphasis"><text:span text:style-name="T7">তাহলে বক্তার সাথে কোন নির্দিষ্ট তথ্য শেয়ার করতে যাতে তারা </text:span></text:span><text:span text:style-name="Strong_20_Emphasis"><text:span text:style-name="T8">"</text:span></text:span><text:span text:style-name="Strong_20_Emphasis"><text:span text:style-name="T7">ব্যথা অনুভব</text:span></text:span><text:span text:style-name="Strong_20_Emphasis"><text:span text:style-name="T8">" </text:span></text:span><text:span text:style-name="Strong_20_Emphasis"><text:span text:style-name="T7">করতে পারে</text:span></text:span><text:span text:style-name="Strong_20_Emphasis"><text:span text:style-name="T8">?</text:span></text:span><text:span text:style-name="T9"><text:line-break/>(</text:span><text:span text:style-name="T10">শিক্ষার্থীদের উত্তর ভিন্ন হবে</text:span><text:span text:style-name="T9">) </text:span><text:span text:style-name="T10">সম্ভাব্য উত্তর</text:span><text:span text:style-name="T9">: </text:span><text:span text:style-name="T10">আমি তাদের ডুবে যাওয়া গ্রামের ছবি দেখাবো</text:span><text:span text:style-name="T9">, </text:span><text:span text:style-name="T10">বিশুদ্ধ পানীয় জলের অভাব বর্ণনা করবো এবং দুর্যোগের ফলে বিচ্ছিন্ন বা অনাহারে থাকা পরিবারগুলির গল্প শেয়ার করবো।</text:span></text:p>
        </text:list-item>
        <text:list-item>
          <text:p text:style-name="P19"><text:span text:style-name="Strong_20_Emphasis"><text:span text:style-name="T5">Write a brief response from the perspective of someone who has decided to "lend your hand" and "relieve the people of Bangladesh."</text:span></text:span><text:span text:style-name="T6"><text:line-break/>(Student answers will vary) A possible answer: "I heard your plea, and I cannot stand by while such a disaster unfolds. I have donated to a verified charity and am organizing a local fundraiser. We will not turn away."</text:span></text:p>
          <text:p text:style-name="P19"><text:span text:style-name="Strong_20_Emphasis"><text:span text:style-name="T12">"</text:span></text:span><text:span text:style-name="Strong_20_Emphasis"><text:span text:style-name="T11">আপনার সাহায্যের হাত বাড়িয়ে</text:span></text:span><text:span text:style-name="Strong_20_Emphasis"><text:span text:style-name="T12">" </text:span></text:span><text:span text:style-name="Strong_20_Emphasis"><text:span text:style-name="T11">এবং </text:span></text:span><text:span text:style-name="Strong_20_Emphasis"><text:span text:style-name="T12">"</text:span></text:span><text:span text:style-name="Strong_20_Emphasis"><text:span text:style-name="T11">বাংলাদেশের জনগণকে ত্রাণ</text:span></text:span><text:span text:style-name="Strong_20_Emphasis"><text:span text:style-name="T12">" </text:span></text:span><text:span text:style-name="Strong_20_Emphasis"><text:span text:style-name="T11">দেওয়ার সিদ্ধান্ত নিয়েছেন এমন একজনের দৃষ্টিকোণ থেকে একটি সংক্ষিপ্ত প্রতিক্রিয়া লিখুন।</text:span></text:span><text:span text:style-name="T13"><text:line-break/>(</text:span><text:span text:style-name="T14">শিক্ষার্থীদের উত্তর ভিন্ন হবে</text:span><text:span text:style-name="T13">) </text:span><text:span text:style-name="T14">সম্ভাব্য উত্তর</text:span><text:span text:style-name="T13">: "</text:span><text:span text:style-name="T14">আমি আপনার আবেদন শুনেছি</text:span><text:span text:style-name="T13">, </text:span><text:span text:style-name="T14">এবং এই ধরনের দুর্যোগের সময় আমি চুপ করে থাকতে পারছি না। আমি একটি যাচাইকৃত দাতব্য প্রতিষ্ঠানে দান করেছি এবং একটি স্থানীয় তহবিল সংগ্রহের আয়োজন করছি। আমরা মুখ ফিরিয়ে নেব না।</text:span><text:span text:style-name="T13">"</text:span></text:p>
        </text:list-item>
        <text:list-item>
          <text:p text:style-name="P19"><text:soft-page-break/><text:span text:style-name="Strong_20_Emphasis"><text:span text:style-name="T5">How might this poem be more effective if it were a song? (The rhythm and repetition suggest it might be a song lyric).</text:span></text:span><text:span text:style-name="T6"><text:line-break/>As a song, the repetitive chorus ("Bangladesh, Bangladesh / Relieve the people of Bangladesh") would be more memorable and emotive. Music and melody could amplify the sadness and urgency, reaching a mass audience through radio or live performance, much like a protest song or charity anthem.</text:span></text:p>
          <text:p text:style-name="P20"><text:span text:style-name="Strong_20_Emphasis"><text:span text:style-name="T7">এই কবিতাটি যদি একটি গান হতো তাহলে কীভাবে আরও কার্যকর হতো</text:span></text:span><text:span text:style-name="Strong_20_Emphasis"><text:span text:style-name="T8">? (</text:span></text:span><text:span text:style-name="Strong_20_Emphasis"><text:span text:style-name="T7">ছন্দ এবং পুনরাবৃত্তি ইঙ্গিত দেয় যে এটি একটি গানের কথা হতে পারে</text:span></text:span><text:span text:style-name="Strong_20_Emphasis"><text:span text:style-name="T8">)</text:span></text:span><text:span text:style-name="Strong_20_Emphasis"><text:span text:style-name="T7">।</text:span></text:span><text:span text:style-name="T9"><text:line-break/></text:span><text:span text:style-name="T10">একটি গান হিসেবে</text:span><text:span text:style-name="T9">, </text:span><text:span text:style-name="T10">পুনরাবৃত্তিমূলক কোরাস </text:span><text:span text:style-name="T9">("</text:span><text:span text:style-name="T10">বাংলাদেশ</text:span><text:span text:style-name="T9">, </text:span><text:span text:style-name="T10">বাংলাদেশ </text:span><text:span text:style-name="T9">/ </text:span><text:span text:style-name="T10">বাংলাদেশের জনগণকে স্বস্তি দাও</text:span><text:span text:style-name="T9">") </text:span><text:span text:style-name="T10">আরও স্মরণীয় এবং আবেগপ্রবণ হবে। সঙ্গীত এবং সুর দুঃখ এবং তাগিদকে আরও বাড়িয়ে তুলতে পারে</text:span><text:span text:style-name="T9">, </text:span><text:span text:style-name="T10">রেডিও বা লাইভ পারফর্মেন্সের মাধ্যমে ব্যাপক শ্রোতাদের কাছে পৌঁছাতে পারে</text:span><text:span text:style-name="T9">, </text:span><text:span text:style-name="T10">অনেকটা প্রতিবাদী গান বা দাতব্য সঙ্গীতের মতো।</text:span></text:p>
        </text:list-item>
        <text:list-item>
          <text:p text:style-name="P19"><text:span text:style-name="Strong_20_Emphasis"><text:span text:style-name="T5">The poem ends with a plea: "Now, please don't turn away". What are some common reasons people might "turn away" from global crises, and how does the poem try to counter those reasons?</text:span></text:span><text:span text:style-name="T6"><text:line-break/>People might turn away due to feeling overwhelmed, believing the problem is too distant, feeling their contribution is too small, or simply feeling fatigued by bad news. The poem counters this by making the request personal ("I want to hear you say") and emphasizing that any action ("lend your hand") is valuable.</text:span></text:p>
          <text:p text:style-name="P19"><text:span text:style-name="Strong_20_Emphasis"><text:span text:style-name="T18">কবিতাটি শেষ হয় একটি আবেদন দিয়ে</text:span></text:span><text:span text:style-name="Strong_20_Emphasis"><text:span text:style-name="T5">: "</text:span></text:span><text:span text:style-name="Strong_20_Emphasis"><text:span text:style-name="T18">এখন</text:span></text:span><text:span text:style-name="Strong_20_Emphasis"><text:span text:style-name="T5">, </text:span></text:span><text:span text:style-name="Strong_20_Emphasis"><text:span text:style-name="T18">দয়া করে মুখ ফিরিয়ে নাও</text:span></text:span><text:span text:style-name="Strong_20_Emphasis"><text:span text:style-name="T5">"</text:span></text:span><text:span text:style-name="Strong_20_Emphasis"><text:span text:style-name="T18">। বিশ্বব্যাপী সংকট থেকে মানুষ </text:span></text:span><text:span text:style-name="Strong_20_Emphasis"><text:span text:style-name="T5">"</text:span></text:span><text:span text:style-name="Strong_20_Emphasis"><text:span text:style-name="T18">মুখ ফিরিয়ে নেওয়ার</text:span></text:span><text:span text:style-name="Strong_20_Emphasis"><text:span text:style-name="T5">" </text:span></text:span><text:span text:style-name="Strong_20_Emphasis"><text:span text:style-name="T18">কিছু সাধারণ কারণ কী এবং কবিতাটি কীভাবে সেই কারণগুলিকে প্রতিহত করার চেষ্টা করে</text:span></text:span><text:span text:style-name="Strong_20_Emphasis"><text:span text:style-name="T5">?</text:span></text:span><text:span text:style-name="T6"><text:line-break/></text:span><text:span text:style-name="T19">মানুষ হয়তো অভিভূত বোধ করে</text:span><text:span text:style-name="T6">, </text:span><text:span text:style-name="T19">সমস্যাটি খুব দূরে বলে মনে করে</text:span><text:span text:style-name="T6">, </text:span><text:span text:style-name="T19">তাদের অবদানকে খুব ছোট মনে করে</text:span><text:span text:style-name="T6">, </text:span><text:span text:style-name="T19">অথবা কেবল খারাপ খবরে ক্লান্ত বোধ করে মুখ ফিরিয়ে নিতে পারে। কবিতাটি অনুরোধটিকে ব্যক্তিগত করে </text:span><text:span text:style-name="T6">("</text:span><text:span text:style-name="T19">আমি তোমার কথা শুনতে চাই</text:span><text:span text:style-name="T6">") </text:span><text:span text:style-name="T19">এবং যেকোনো পদক্ষেপ </text:span><text:span text:style-name="T6">("</text:span><text:span text:style-name="T19">তোমার হাত ধার দাও</text:span><text:span text:style-name="T6">") </text:span><text:span text:style-name="T19">মূল্যবান বলে জোর দিয়ে এর প্রতিবাদ করে।</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2T18:10:22.138121063</meta:creation-date>
    <dc:date>2025-11-22T18:40:28.115421170</dc:date>
    <meta:editing-duration>PT7M16S</meta:editing-duration>
    <meta:editing-cycles>1</meta:editing-cycles>
    <meta:document-statistic meta:table-count="0" meta:image-count="0" meta:object-count="0" meta:page-count="7" meta:paragraph-count="66" meta:word-count="2283" meta:character-count="11893" meta:non-whitespace-character-count="9677"/>
    <meta:generator>LibreOffice/25.8.2.2$Linux_X86_64 LibreOffice_project/580$Build-2</meta:generator>
  </office:meta>
</office:document-meta>
</file>
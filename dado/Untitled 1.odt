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839" officeooo:paragraph-rsid="000da839"/>
    </style:style>
    <style:style style:name="P2" style:family="paragraph" style:parent-style-name="Standard">
      <style:text-properties officeooo:rsid="000dec5f" officeooo:paragraph-rsid="000de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quick brown fox jumps over the lazy dog.</text:p>
      <text:p text:style-name="P2">A quick brown fox jumps over the lazy dog.</text:p>
      <text:p text:style-name="P2">A quick brown fox jumps over he laz dog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7:04:33.656207400</meta:creation-date>
    <dc:date>2026-02-12T17:22:54.151482117</dc:date>
    <meta:editing-duration>PT7M24S</meta:editing-duration>
    <meta:editing-cycles>1</meta:editing-cycles>
    <meta:document-statistic meta:table-count="0" meta:image-count="0" meta:object-count="0" meta:page-count="1" meta:paragraph-count="3" meta:word-count="27" meta:character-count="124" meta:non-whitespace-character-count="99"/>
    <meta:generator>LibreOffice/25.8.4.2$Linux_X86_64 LibreOffice_project/580$Build-2</meta:generator>
  </office:meta>
</office:document-meta>
</file>
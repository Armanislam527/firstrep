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/>
    </style:style>
    <style:style style:name="P3" style:family="paragraph" style:parent-style-name="Table_20_Heading">
      <style:paragraph-properties fo:line-height="100%" fo:text-align="left" style:justify-single-word="false"/>
    </style:style>
    <style:style style:name="P4" style:family="paragraph" style:parent-style-name="Table_20_Contents">
      <style:paragraph-properties fo:line-height="100%"/>
    </style:style>
    <style:style style:name="P5" style:family="paragraph" style:parent-style-name="Table_20_Contents">
      <style:paragraph-properties fo:line-height="100%" fo:text-align="left" style:justify-single-word="false"/>
    </style:style>
    <style:style style:name="P6" style:family="paragraph" style:parent-style-name="Table_20_Contents">
      <style:paragraph-properties fo:line-height="100%"/>
      <style:text-properties officeooo:paragraph-rsid="0002600e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Preformatted_20_Text">
      <style:paragraph-properties fo:margin-top="0in" fo:margin-bottom="0.1965in" style:contextual-spacing="false" fo:line-height="100%"/>
    </style:style>
    <style:style style:name="P9" style:family="paragraph" style:parent-style-name="Quotations">
      <style:paragraph-properties fo:line-height="100%"/>
    </style:style>
    <style:style style:name="P10" style:family="paragraph" style:parent-style-name="Horizontal_20_Line">
      <style:paragraph-properties fo:line-height="100%"/>
    </style:style>
    <style:style style:name="P11" style:family="paragraph" style:parent-style-name="Heading_20_3">
      <style:paragraph-properties fo:line-height="100%"/>
    </style:style>
    <style:style style:name="P12" style:family="paragraph" style:parent-style-name="Text_20_body" style:list-style-name="L1">
      <style:paragraph-properties fo:line-height="100%"/>
    </style:style>
    <style:style style:name="P13" style:family="paragraph" style:parent-style-name="Preformatted_20_Text" style:list-style-name="L1">
      <style:paragraph-properties fo:margin-top="0in" fo:margin-bottom="0.1965in" style:contextual-spacing="false" fo:line-height="100%"/>
    </style:style>
    <style:style style:name="P14" style:family="paragraph" style:parent-style-name="Text_20_body" style:list-style-name="L2">
      <style:paragraph-properties fo:line-height="100%"/>
    </style:style>
    <style:style style:name="P15" style:family="paragraph" style:parent-style-name="Preformatted_20_Text" style:list-style-name="L2">
      <style:paragraph-properties fo:margin-top="0in" fo:margin-bottom="0.1965in" style:contextual-spacing="false" fo:line-height="100%"/>
    </style:style>
    <style:style style:name="P16" style:family="paragraph" style:parent-style-name="Text_20_body" style:list-style-name="L2">
      <style:paragraph-properties fo:margin-top="0in" fo:margin-bottom="0in" style:contextual-spacing="false" fo:line-height="100%"/>
    </style:style>
    <style:style style:name="T1" style:family="text">
      <style:text-properties fo:font-weight="bold"/>
    </style:style>
    <style:style style:name="T2" style:family="text">
      <style:text-properties officeooo:rsid="0002600e"/>
    </style:style>
    <style:style style:name="T3" style:family="text">
      <style:text-properties style:font-name="Liberation Mono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✅ Final Corrected Code for <text:span text:style-name="T1">Waveshare Pi Pico SX1262</text:span></text:h>
      <text:h text:style-name="P2" text:outline-level="2">🔧 Critical Pin Mappings for Waveshare Pico-LoRa-SX1262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3">Function</text:p>
            </table:table-cell>
            <table:table-cell table:style-name="Table1.A1" office:value-type="string">
              <text:p text:style-name="P3">Waveshare Pin</text:p>
            </table:table-cell>
            <table:table-cell table:style-name="Table1.C1" office:value-type="string">
              <text:p text:style-name="P3">RP2040 GPIO</text:p>
            </table:table-cell>
          </table:table-row>
        </table:table-header-rows>
        <table:table-row>
          <table:table-cell table:style-name="Table1.A2" office:value-type="string">
            <text:p text:style-name="P4"><text:span text:style-name="T1">LoRa CS/NSS</text:span></text:p>
          </table:table-cell>
          <table:table-cell table:style-name="Table1.A2" office:value-type="string">
            <text:p text:style-name="P5">LoRa_CS</text:p>
          </table:table-cell>
          <table:table-cell table:style-name="Table1.C2" office:value-type="string">
            <text:p text:style-name="P4"><text:span text:style-name="T1">GPIO 3</text:span></text:p>
          </table:table-cell>
        </table:table-row>
        <table:table-row>
          <table:table-cell table:style-name="Table1.A2" office:value-type="string">
            <text:p text:style-name="P4"><text:span text:style-name="T1">LoRa BUSY</text:span></text:p>
          </table:table-cell>
          <table:table-cell table:style-name="Table1.A2" office:value-type="string">
            <text:p text:style-name="P5">LoRa_BUSY</text:p>
          </table:table-cell>
          <table:table-cell table:style-name="Table1.C2" office:value-type="string">
            <text:p text:style-name="P4"><text:span text:style-name="T1">GPIO 2</text:span></text:p>
          </table:table-cell>
        </table:table-row>
        <table:table-row>
          <table:table-cell table:style-name="Table1.A2" office:value-type="string">
            <text:p text:style-name="P4"><text:span text:style-name="T1">LoRa RST</text:span></text:p>
          </table:table-cell>
          <table:table-cell table:style-name="Table1.A2" office:value-type="string">
            <text:p text:style-name="P5">LoRa_RESET</text:p>
          </table:table-cell>
          <table:table-cell table:style-name="Table1.C2" office:value-type="string">
            <text:p text:style-name="P4"><text:span text:style-name="T1">GPIO 15</text:span></text:p>
          </table:table-cell>
        </table:table-row>
        <table:table-row>
          <table:table-cell table:style-name="Table1.A2" office:value-type="string">
            <text:p text:style-name="P4"><text:span text:style-name="T1">LoRa DIO1</text:span></text:p>
          </table:table-cell>
          <table:table-cell table:style-name="Table1.A2" office:value-type="string">
            <text:p text:style-name="P5">LoRa_DIO1</text:p>
          </table:table-cell>
          <table:table-cell table:style-name="Table1.C2" office:value-type="string">
            <text:p text:style-name="P4"><text:span text:style-name="T1">GPIO 20</text:span></text:p>
          </table:table-cell>
        </table:table-row>
        <table:table-row>
          <table:table-cell table:style-name="Table1.A2" office:value-type="string">
            <text:p text:style-name="P4"><text:span text:style-name="T1">SPI SCK</text:span></text:p>
          </table:table-cell>
          <table:table-cell table:style-name="Table1.A2" office:value-type="string">
            <text:p text:style-name="P5">LoRa_CLK</text:p>
          </table:table-cell>
          <table:table-cell table:style-name="Table1.C2" office:value-type="string">
            <text:p text:style-name="P4"><text:span text:style-name="T1">GPIO 10</text:span></text:p>
          </table:table-cell>
        </table:table-row>
        <table:table-row>
          <table:table-cell table:style-name="Table1.A2" office:value-type="string">
            <text:p text:style-name="P4"><text:span text:style-name="T1">SPI MOSI</text:span></text:p>
          </table:table-cell>
          <table:table-cell table:style-name="Table1.A2" office:value-type="string">
            <text:p text:style-name="P5">LoRa_MOSI</text:p>
          </table:table-cell>
          <table:table-cell table:style-name="Table1.C2" office:value-type="string">
            <text:p text:style-name="P4"><text:span text:style-name="T1">GPIO 11</text:span></text:p>
          </table:table-cell>
        </table:table-row>
        <table:table-row>
          <table:table-cell table:style-name="Table1.A2" office:value-type="string">
            <text:p text:style-name="P4"><text:span text:style-name="T1">SPI MISO</text:span></text:p>
          </table:table-cell>
          <table:table-cell table:style-name="Table1.A2" office:value-type="string">
            <text:p text:style-name="P5">LoRa_MISO</text:p>
          </table:table-cell>
          <table:table-cell table:style-name="Table1.C2" office:value-type="string">
            <text:p text:style-name="P4"><text:span text:style-name="T1">GPIO 12</text:span></text:p>
          </table:table-cell>
        </table:table-row>
        <table:table-row>
          <table:table-cell table:style-name="Table1.A2" office:value-type="string">
            <text:p text:style-name="P4"><text:span text:style-name="T1">I2C SDA</text:span></text:p>
          </table:table-cell>
          <table:table-cell table:style-name="Table1.A2" office:value-type="string">
            <text:p text:style-name="P5">(external)</text:p>
          </table:table-cell>
          <table:table-cell table:style-name="Table1.C2" office:value-type="string">
            <text:p text:style-name="P6"><text:span text:style-name="T1">GPIO 4</text:span> ✅<text:span text:style-name="T2">(New Modification)</text:span></text:p>
          </table:table-cell>
        </table:table-row>
        <table:table-row>
          <table:table-cell table:style-name="Table1.A2" office:value-type="string">
            <text:p text:style-name="P4"><text:span text:style-name="T1">I2C SCL</text:span></text:p>
          </table:table-cell>
          <table:table-cell table:style-name="Table1.A2" office:value-type="string">
            <text:p text:style-name="P5">(external)</text:p>
          </table:table-cell>
          <table:table-cell table:style-name="Table1.C2" office:value-type="string">
            <text:p text:style-name="P6"><text:span text:style-name="T1">GPIO 5</text:span> ✅<text:span text:style-name="T2">(New Modification)</text:span></text:p>
          </table:table-cell>
        </table:table-row>
      </table:table>
      <text:p text:style-name="P7"/>
      <text:h text:style-name="P2" text:outline-level="2" text:is-list-header="true">📜 Final Working Code (Arduino IDE for RP2040)</text:h>
      <text:p text:style-name="P8">#include &lt;RadioLib.h&gt;<text:line-break/>#include &lt;U8g2lib.h&gt;<text:line-break/>#include &lt;Wire.h&gt;<text:line-break/>#include &lt;SPI.h&gt;<text:line-break/><text:line-break/>// ===== Waveshare Pico-LoRa-SX1262 Pin Definitions =====<text:line-break/>#define LORA_CS <text:s text:c="3"/>3 <text:s text:c="2"/>// NSS<text:line-break/>#define LORA_BUSY <text:s/>2<text:line-break/>#define LORA_RST <text:s text:c="2"/>15<text:line-break/>#define LORA_DIO1 <text:s/>20<text:line-break/>#define LORA_SCK <text:s text:c="2"/>10<text:line-break/>#define LORA_MOSI <text:s/>11<text:line-break/>#define LORA_MISO <text:s/>12<text:line-break/><text:line-break/>#define CARDKB_ADDR 0x5F<text:line-break/><text:line-break/>// ===== RadioLib Module on SPI1 (RP2040) =====<text:line-break/>// RadioLib handles CS internally - NO setCS() needed!<text:line-break/>SX1262 radio = new Module(LORA_CS, LORA_DIO1, LORA_RST, LORA_BUSY, SPI);<text:line-break/><text:line-break/>// ===== OLED on Hardware I2C (RP2040 default: GPIO4/5) =====<text:line-break/>U8G2_SSD1306_128X64_NONAME_F_HW_I2C u8g2(U8G2_R0, /* reset=*/ U8X8_PIN_NONE);<text:line-break/><text:line-break/>String inputBuffer = "";<text:line-break/>String lastReceived = "No Traffic";<text:line-break/><text:line-break/>// ===== Display Update Function =====<text:line-break/>void updateDisplay(const String&amp; header, const String&amp; body) {<text:line-break/> <text:s/>u8g2.clearBuffer();<text:line-break/> <text:s/>u8g2.setFont(u8g2_font_6x10_tf);<text:line-break/><text:soft-page-break/> <text:s/><text:line-break/> <text:s/>// Truncate header to fit 128px width (~21 chars @ 6px/font)<text:line-break/> <text:s/>String safeHeader = header.length() &gt; 21 ? header.substring(0, 21) : header;<text:line-break/> <text:s/>u8g2.drawStr(0, 10, safeHeader.c_str());<text:line-break/><text:line-break/> <text:s/>// Safe body truncation (2 lines max, 21 chars each)<text:line-break/> <text:s/>if (body.length() &lt;= 21) {<text:line-break/> <text:s text:c="3"/>u8g2.drawStr(0, 25, body.c_str());<text:line-break/> <text:s/>} else {<text:line-break/> <text:s text:c="3"/>String part1 = body.substring(0, 21);<text:line-break/> <text:s text:c="3"/>String part2 = body.substring(21, 42); // Prevent overflow<text:line-break/> <text:s text:c="3"/>u8g2.drawStr(0, 25, part1.c_str());<text:line-break/> <text:s text:c="3"/>u8g2.drawStr(0, 37, part2.c_str());<text:line-break/> <text:s/>}<text:line-break/><text:line-break/> <text:s/>// Input prompt + buffer<text:line-break/> <text:s/>u8g2.drawStr(0, 54, "&gt; ");<text:line-break/> <text:s/>String safeInput = inputBuffer.length() &gt; 18 ? inputBuffer.substring(0, 18) + "..." : inputBuffer;<text:line-break/> <text:s/>u8g2.drawStr(12, 54, safeInput.c_str());<text:line-break/> <text:s/><text:line-break/> <text:s/>u8g2.sendBuffer();<text:line-break/>}<text:line-break/><text:line-break/>// ===== Setup =====<text:line-break/>void setup() {<text:line-break/> <text:s/>Serial.begin(115200);<text:line-break/> <text:s/>while (!Serial &amp;&amp; millis() &lt; 3000); // Wait for serial (RP2040 quirk)<text:line-break/><text:line-break/> <text:s/>// LoRa GPIO setup (CS, RST)<text:line-break/> <text:s/>pinMode(LORA_CS, OUTPUT);<text:line-break/> <text:s/>digitalWrite(LORA_CS, HIGH);<text:line-break/> <text:s/>pinMode(LORA_RST, OUTPUT);<text:line-break/> <text:s/>digitalWrite(LORA_RST, LOW);<text:line-break/> <text:s/>delay(100);<text:line-break/> <text:s/>digitalWrite(LORA_RST, HIGH);<text:line-break/> <text:s/>delay(200);<text:line-break/><text:line-break/> <text:s/>// ===== I2C Setup for RP2040 (GPIO 4 = SDA, GPIO 5 = SCL) =====<text:line-break/> <text:s/>Wire.setSDA(4); <text:s text:c="2"/>// ✅ RP2040 default I2C0 SDA<text:line-break/> <text:s/>Wire.setSCL(5); <text:s text:c="2"/>// ✅ RP2040 default I2C0 SCL<text:line-break/> <text:s/>Wire.begin();<text:line-break/><text:line-break/> <text:s/>// OLED Init<text:line-break/> <text:s/>u8g2.begin();<text:line-break/> <text:s/>updateDisplay("BOOTING...", "CYBERDECK v1.35");<text:line-break/><text:line-break/> <text:s/>// ===== SPI1 Setup for LoRa (RP2040) =====<text:line-break/> <text:s/>SPI.setSCK(LORA_SCK);<text:line-break/> <text:s/>SPI.setTX(LORA_MOSI); <text:s text:c="2"/>// RP2040 Arduino core alias<text:line-break/> <text:s/>SPI.setRX(LORA_MISO);<text:line-break/> <text:s/>// ❌ DO NOT use SPI.setCS() - RadioLib handles CS via GPIO!<text:line-break/> <text:s/>SPI.begin();<text:line-break/><text:line-break/> <text:s/>// ===== LoRa Radio Init =====<text:line-break/> <text:s/>// Frequency: 915.0 MHz (US band) - change to 868.0 for EU, 433.0 for Asia<text:line-break/> <text:s/>int state = radio.begin(915.0);<text:line-break/> <text:s/><text:line-break/> <text:s/>if (state == RADIOLIB_ERR_NONE) {<text:line-break/><text:soft-page-break/> <text:s text:c="3"/>radio.setSyncWord(0x12); <text:s text:c="7"/>// Private network<text:line-break/> <text:s text:c="3"/>radio.setSpreadingFactor(7); <text:s text:c="3"/>// SF7 for speed, or 9-12 for range<text:line-break/> <text:s text:c="3"/>radio.setBandwidth(125.0); <text:s text:c="5"/>// 125 kHz<text:line-break/> <text:s text:c="3"/>radio.setCodingRate(5); <text:s text:c="8"/>// 4/5 coding rate<text:line-break/> <text:s text:c="3"/>radio.setPreambleLength(8);<text:line-break/> <text:s text:c="3"/>radio.setOutputPower(14); <text:s text:c="6"/>// dBm (max ~22 for SX1262)<text:line-break/> <text:s text:c="3"/><text:line-break/> <text:s text:c="3"/>radio.startReceive();<text:line-break/> <text:s text:c="3"/>updateDisplay("RADIO OK", "Ready @ 915 MHz");<text:line-break/> <text:s text:c="3"/>Serial.println("[LoRa] Initialized successfully");<text:line-break/> <text:s/>} else {<text:line-break/> <text:s text:c="3"/>updateDisplay("LoRa ERROR", "Code: " + String(state));<text:line-break/> <text:s text:c="3"/>Serial.print("[LoRa] Init failed, code: ");<text:line-break/> <text:s text:c="3"/>Serial.println(state);<text:line-break/> <text:s text:c="3"/>while (true) { delay(1000); } // Halt on critical error<text:line-break/> <text:s/>}<text:line-break/>}<text:line-break/><text:line-break/>// ===== Main Loop =====<text:line-break/>void loop() {<text:line-break/> <text:s/>// ===== 1. Poll CardKB (I2C Keyboard) =====<text:line-break/> <text:s/>Wire.requestFrom(CARDKB_ADDR, 1);<text:line-break/> <text:s/>if (Wire.available()) {<text:line-break/> <text:s text:c="3"/>char c = Wire.read();<text:line-break/> <text:s text:c="3"/><text:line-break/> <text:s text:c="3"/>if (c != 0x00) { <text:s/>// Ignore null<text:line-break/> <text:s text:c="5"/>bool displayUpdated = false;<text:line-break/> <text:s text:c="5"/><text:line-break/> <text:s text:c="5"/>if (c == 0x0D || c == 0x0A) { <text:s/>// Enter/Return<text:line-break/> <text:s text:c="7"/>if (inputBuffer.length() &gt; 0) {<text:line-break/> <text:s text:c="9"/>updateDisplay("SENDING...", inputBuffer);<text:line-break/> <text:s text:c="9"/>Serial.print("[TX] "); Serial.println(inputBuffer);<text:line-break/> <text:s text:c="9"/><text:line-break/> <text:s text:c="9"/>int txState = radio.transmit(inputBuffer);<text:line-break/> <text:s text:c="9"/><text:line-break/> <text:s text:c="9"/>if (txState == RADIOLIB_ERR_NONE) {<text:line-break/> <text:s text:c="11"/>updateDisplay("SENT ✓", inputBuffer);<text:line-break/> <text:s text:c="9"/>} else {<text:line-break/> <text:s text:c="11"/>updateDisplay("TX FAIL", "Err:" + String(txState));<text:line-break/> <text:s text:c="11"/>Serial.print("[TX Error] "); Serial.println(txState);<text:line-break/> <text:s text:c="9"/>}<text:line-break/> <text:s text:c="9"/>inputBuffer = "";<text:line-break/> <text:s text:c="9"/>radio.startReceive(); <text:s/>// Return to RX mode<text:line-break/> <text:s text:c="9"/>displayUpdated = true;<text:line-break/> <text:s text:c="7"/>}<text:line-break/> <text:s text:c="5"/>} <text:line-break/> <text:s text:c="5"/>else if (c == 0x08 || c == 0x7F) { <text:s/>// Backspace<text:line-break/> <text:s text:c="7"/>if (inputBuffer.length() &gt; 0) {<text:line-break/> <text:s text:c="9"/>inputBuffer.remove(inputBuffer.length() - 1);<text:line-break/> <text:s text:c="9"/>displayUpdated = true;<text:line-break/> <text:s text:c="7"/>}<text:line-break/> <text:s text:c="5"/>} <text:line-break/> <text:s text:c="5"/>else if (c &gt;= 32 &amp;&amp; c &lt;= 126) { <text:s/>// Printable ASCII<text:line-break/> <text:s text:c="7"/>if (inputBuffer.length() &lt; 64) { <text:s/>// Prevent overflow<text:line-break/> <text:s text:c="9"/>inputBuffer += c;<text:line-break/> <text:s text:c="9"/>displayUpdated = true;<text:line-break/> <text:s text:c="7"/>}<text:line-break/> <text:s text:c="5"/>}<text:line-break/> <text:s text:c="5"/><text:line-break/><text:soft-page-break/> <text:s text:c="5"/>if (displayUpdated) {<text:line-break/> <text:s text:c="7"/>updateDisplay("Mi OS COMMS", inputBuffer);<text:line-break/> <text:s text:c="5"/>}<text:line-break/> <text:s text:c="3"/>}<text:line-break/> <text:s/>}<text:line-break/><text:line-break/> <text:s/>// ===== 2. Check for Incoming LoRa Packets =====<text:line-break/> <text:s/>if (radio.available()) {<text:line-break/> <text:s text:c="3"/>String received = "";<text:line-break/> <text:s text:c="3"/>int rxState = radio.readData(received);<text:line-break/> <text:s text:c="3"/><text:line-break/> <text:s text:c="3"/>if (rxState == RADIOLIB_ERR_NONE) {<text:line-break/> <text:s text:c="5"/>lastReceived = received;<text:line-break/> <text:s text:c="5"/>Serial.print("[RX] "); Serial.println(received);<text:line-break/> <text:s text:c="5"/><text:line-break/> <text:s text:c="5"/>// Display with safe header truncation<text:line-break/> <text:s text:c="5"/>String header = "RX: " + received.substring(0, 17); // Max 21 chars<text:line-break/> <text:s text:c="5"/>updateDisplay(header, received);<text:line-break/> <text:s text:c="3"/>} else {<text:line-break/> <text:s text:c="5"/>Serial.print("[RX Error] "); Serial.println(rxState);<text:line-break/> <text:s text:c="3"/>}<text:line-break/> <text:s text:c="3"/>radio.startReceive(); <text:s/>// Critical: restart listening<text:line-break/> <text:s/>}<text:line-break/><text:line-break/> <text:s/>delay(10); <text:s/>// Small delay for stability<text:line-break/>}</text:p>
      <text:h text:style-name="P2" text:outline-level="2">🔌 Wiring Guide for Your Build</text:h>
      <text:p text:style-name="P8">┌─────────────────────────────────────┐<text:line-break/>│ WAVESHARE PICO-LORA-SX1262 + PICO <text:s text:c="2"/>│<text:line-break/>├─────────────────────────────────────┤<text:line-break/>│ <text:s text:c="36"/>│<text:line-break/>│ <text:s/>[OLED SSD1306] <text:s text:c="20"/>│<text:line-break/>│ <text:s/>VCC <text:s/>→ 3.3V (on Pico header) <text:s text:c="6"/>│<text:line-break/>│ <text:s/>GND <text:s/>→ GND <text:s text:c="24"/>│<text:line-break/>│ <text:s/>SDA <text:s/>→ GPIO 4 <text:s text:c="21"/>│<text:line-break/>│ <text:s/>SCL <text:s/>→ GPIO 5 <text:s text:c="21"/>│<text:line-break/>│ <text:s text:c="36"/>│<text:line-break/>│ <text:s/>[CardKB I2C Keyboard] <text:s text:c="13"/>│<text:line-break/>│ <text:s/>VCC <text:s/>→ 3.3V (shared) <text:s text:c="14"/>│<text:line-break/>│ <text:s/>GND <text:s/>→ GND (shared) <text:s text:c="15"/>│<text:line-break/>│ <text:s/>SDA <text:s/>→ GPIO 4 (shared w/ OLED) <text:s text:c="4"/>│<text:line-break/>│ <text:s/>SCL <text:s/>→ GPIO 5 (shared w/ OLED) <text:s text:c="4"/>│<text:line-break/>│ <text:s text:c="36"/>│<text:line-break/>│ <text:s/>[Optional: INMP441 Microphone] <text:s text:c="4"/>│<text:line-break/>│ <text:s/>VCC <text:s/>→ 3.3V <text:s text:c="23"/>│<text:line-break/>│ <text:s/>GND <text:s/>→ GND <text:s text:c="24"/>│<text:line-break/>│ <text:s/>SCK <text:s/>→ GPIO 14 (I2S BCLK) <text:s text:c="9"/>│<text:line-break/>│ <text:s/>WS <text:s text:c="2"/>→ GPIO 15* (I2S WS) <text:s/>← CONFLICT! │<text:line-break/>│ <text:s/>SD <text:s text:c="2"/>→ GPIO 16 (I2S DIN) <text:s text:c="10"/>│<text:line-break/>│ <text:s/>L/R <text:s/>→ GND <text:s text:c="24"/>│<text:line-break/>│ <text:s text:c="36"/>│<text:line-break/>│ <text:s/>*NOTE: GPIO15 is LoRa_RST! <text:s text:c="8"/>│<text:line-break/>│ <text:s text:c="2"/>→ Use MAX9814 analog mic instead: │<text:line-break/>│ <text:s text:c="5"/>OUT → GPIO 26 (ADC0) <text:s text:c="10"/>│<text:line-break/>│ <text:s text:c="36"/>│<text:line-break/>└─────────────────────────────────────┘</text:p>
      <text:p text:style-name="P9"><text:soft-page-break/>⚠️ <text:span text:style-name="T1">GPIO 15 is used for LoRa RESET</text:span> — you cannot use it for I2S microphone WS pin. Use an <text:span text:style-name="T1">analog mic (MAX9814)</text:span> on ADC pin (GPIO 26/27/28/29) instead.</text:p>
      <text:p text:style-name="P10"/>
      <text:h text:style-name="P2" text:outline-level="2">🎤 Microphone Recommendation for Temu</text:h>
      <text:p text:style-name="P7">Since GPIO 15 is occupied, <text:span text:style-name="T1">avoid I2S mics</text:span> like INMP441. Instead:</text:p>
      <text:h text:style-name="P11" text:outline-level="3">✅ Best Choice: <text:span text:style-name="T1">MAX9814 Electret Mic with AGC</text:span></text:h>
      <text:p text:style-name="P7"><text:span text:style-name="T1">Search Temu for</text:span>: <text:span text:style-name="T3">"MAX9814 microphone module"</text:span></text:p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P3">Feature</text:p>
            </table:table-cell>
            <table:table-cell table:style-name="Table2.B1" office:value-type="string">
              <text:p text:style-name="P3">Why It's Good</text:p>
            </table:table-cell>
          </table:table-row>
        </table:table-header-rows>
        <table:table-row>
          <table:table-cell table:style-name="Table2.A2" office:value-type="string">
            <text:p text:style-name="P5">Analog output</text:p>
          </table:table-cell>
          <table:table-cell table:style-name="Table2.B2" office:value-type="string">
            <text:p text:style-name="P5">Works on GPIO 26 (ADC0) — no pin conflict</text:p>
          </table:table-cell>
        </table:table-row>
        <table:table-row>
          <table:table-cell table:style-name="Table2.A2" office:value-type="string">
            <text:p text:style-name="P5">Auto Gain Control</text:p>
          </table:table-cell>
          <table:table-cell table:style-name="Table2.B2" office:value-type="string">
            <text:p text:style-name="P5">Automatically adjusts volume for clear voice</text:p>
          </table:table-cell>
        </table:table-row>
        <table:table-row>
          <table:table-cell table:style-name="Table2.A2" office:value-type="string">
            <text:p text:style-name="P5">3.3V/5V compatible</text:p>
          </table:table-cell>
          <table:table-cell table:style-name="Table2.B2" office:value-type="string">
            <text:p text:style-name="P5">Safe for Pico</text:p>
          </table:table-cell>
        </table:table-row>
        <table:table-row>
          <table:table-cell table:style-name="Table2.A2" office:value-type="string">
            <text:p text:style-name="P5">Built-in amp</text:p>
          </table:table-cell>
          <table:table-cell table:style-name="Table2.B2" office:value-type="string">
            <text:p text:style-name="P5">No extra circuitry needed</text:p>
          </table:table-cell>
        </table:table-row>
        <table:table-row>
          <table:table-cell table:style-name="Table2.A2" office:value-type="string">
            <text:p text:style-name="P5">~$1.50 on Temu</text:p>
          </table:table-cell>
          <table:table-cell table:style-name="Table2.B2" office:value-type="string">
            <text:p text:style-name="P5">Budget-friendly</text:p>
          </table:table-cell>
        </table:table-row>
      </table:table>
      <text:p text:style-name="P7"/>
      <text:p text:style-name="P7"><text:span text:style-name="T1">Wiring</text:span>:</text:p>
      <text:p text:style-name="P8">MAX9814 → Waveshare Pico<text:line-break/>VCC <text:s text:c="4"/>→ 3.3V<text:line-break/>GND <text:s text:c="4"/>→ GND<text:line-break/>OUT <text:s text:c="4"/>→ GPIO 26 (ADC0)<text:line-break/>GAIN <text:s text:c="3"/>→ Leave open (default 40dB) or tie to VCC for 50dB</text:p>
      <text:p text:style-name="P7"><text:span text:style-name="T1">Basic ADC Reading Example</text:span> (add to your code):</text:p>
      <text:p text:style-name="P8">#define MIC_PIN 26 <text:s/>// ADC0<text:line-break/><text:line-break/>void setup() {<text:line-break/> <text:s/>// ... existing setup ...<text:line-break/> <text:s/>adc_init();<text:line-break/> <text:s/>adc_gpio_init(MIC_PIN);<text:line-break/> <text:s/>adc_select_input(0); <text:s/>// ADC channel 0 = GPIO 26<text:line-break/>}<text:line-break/><text:line-break/>int readMicLevel() {<text:line-break/> <text:s/>adc_select_input(0);<text:line-break/> <text:s/>return adc_read(); <text:s/>// Returns 0-4095<text:line-break/>}</text:p>
      <text:p text:style-name="P10"/>
      <text:h text:style-name="P2" text:outline-level="2">🚨 If Your Screen Still Says "BOOTING"</text:h>
      <text:list text:style-name="L1">
        <text:list-item>
          <text:p text:style-name="P12"><text:span text:style-name="T1">Verify I2C pins</text:span>: OLED/CardKB must use <text:span text:style-name="T1">GPIO 4 (SDA) + GPIO 5 (SCL)</text:span> <text:a xlink:type="simple" xlink:href="https://en.wikipedia.org/wiki/32" text:style-name="Internet_20_link" text:visited-style-name="Visited_20_Internet_20_Link">32</text:a></text:p>
        </text:list-item>
        <text:list-item>
          <text:p text:style-name="P12"><text:span text:style-name="T1">Run I2C Scanner</text:span> to confirm devices are detected:</text:p>
          <text:p text:style-name="P13"><text:soft-page-break/>#include &lt;Wire.h&gt;<text:line-break/>void setup() {<text:line-break/> <text:s/>Serial.begin(115200);<text:line-break/> <text:s/>Wire.setSDA(4); Wire.setSCL(5); Wire.begin();<text:line-break/> <text:s/>Serial.println("Scanning I2C...");<text:line-break/> <text:s/>for (byte addr = 1; addr &lt; 127; addr++) {<text:line-break/> <text:s text:c="3"/>Wire.beginTransmission(addr);<text:line-break/> <text:s text:c="3"/>if (Wire.endTransmission() == 0) {<text:line-break/> <text:s text:c="5"/>Serial.print("Found: 0x"); Serial.println(addr, HEX);<text:line-break/> <text:s text:c="3"/>}<text:line-break/> <text:s/>}<text:line-break/>}<text:line-break/>void loop() {}</text:p>
          <text:p text:style-name="P12">✅ Should show: <text:span text:style-name="T3">0x3C</text:span> (OLED) and <text:span text:style-name="T3">0x5F</text:span> (CardKB)</text:p>
        </text:list-item>
        <text:list-item>
          <text:p text:style-name="P12"><text:span text:style-name="T1">Check pull-up resistors</text:span>: Add 4.7kΩ resistors from SDA→3.3V and SCL→3.3V if your modules lack them.</text:p>
        </text:list-item>
        <text:list-item>
          <text:p text:style-name="P12"><text:span text:style-name="T1">Power</text:span>: Ensure stable 3.3V — LoRa + OLED + Keyboard can draw ~100mA peak.</text:p>
        </text:list-item>
      </text:list>
      <text:p text:style-name="P10"/>
      <text:h text:style-name="P2" text:outline-level="2">📦 Arduino IDE Setup for RP2040</text:h>
      <text:list text:style-name="L2">
        <text:list-item>
          <text:p text:style-name="P14">Install <text:span text:style-name="T1">Arduino IDE</text:span></text:p>
        </text:list-item>
        <text:list-item>
          <text:p text:style-name="P14">Add RP2040 board support:</text:p>
          <text:p text:style-name="P15">File → Preferences → Additional Boards Manager URLs:<text:line-break/>https://github.com/earlephilhower/arduino-pico/releases/download/4.0.2/package_rp2040_index.json</text:p>
        </text:list-item>
        <text:list-item>
          <text:p text:style-name="P14">Install via <text:span text:style-name="T1">Boards Manager</text:span>: Search <text:span text:style-name="T3">rp2040</text:span> → Install "Raspberry Pi Pico/RP2040" by Earle F. Philhower III</text:p>
        </text:list-item>
        <text:list-item>
          <text:p text:style-name="P14">Select board: <text:span text:style-name="T1">Tools → Board → Raspberry Pi Pico</text:span></text:p>
        </text:list-item>
        <text:list-item>
          <text:p text:style-name="P16">Install libraries via Library Manager:</text:p>
          <text:list>
            <text:list-item>
              <text:p text:style-name="P14"><text:span text:style-name="T3">RadioLib</text:span> by Jan Gromeš</text:p>
            </text:list-item>
            <text:list-item>
              <text:p text:style-name="P14"><text:span text:style-name="T3">U8g2</text:span> by oliver</text:p>
            </text:list-item>
          </text:list>
        </text:list-item>
        <text:list-item>
          <text:p text:style-name="P14">Upload code (hold <text:span text:style-name="T1">BOOTSEL</text:span> while connecting USB if needed)</text:p>
        </text:list-item>
      </text:list>
      <text:p text:style-name="P10"/>
      <text:h text:style-name="P2" text:outline-level="2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8T08:54:28.546504413</meta:creation-date>
    <dc:date>2026-05-18T09:01:17.200017661</dc:date>
    <meta:editing-duration>PT6M53S</meta:editing-duration>
    <meta:editing-cycles>1</meta:editing-cycles>
    <meta:document-statistic meta:table-count="2" meta:image-count="0" meta:object-count="0" meta:page-count="6" meta:paragraph-count="74" meta:word-count="1216" meta:character-count="9236" meta:non-whitespace-character-count="6901"/>
    <meta:generator>LibreOffice/26.2.2.2$Linux_X86_64 LibreOffice_project/620$Build-2</meta:generator>
  </office:meta>
</office:document-meta>
</file>
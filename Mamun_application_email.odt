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a504"/>
    </style:style>
    <style:style style:name="P2" style:family="paragraph" style:parent-style-name="Standard">
      <style:text-properties officeooo:rsid="001cfd9d" officeooo:paragraph-rsid="001cfd9d"/>
    </style:style>
    <style:style style:name="P3" style:family="paragraph" style:parent-style-name="Standard">
      <style:text-properties officeooo:paragraph-rsid="001b3759"/>
    </style:style>
    <style:style style:name="P4" style:family="paragraph" style:parent-style-name="Standard">
      <style:text-properties officeooo:paragraph-rsid="00199de8"/>
    </style:style>
    <style:style style:name="T1" style:family="text">
      <style:text-properties officeooo:rsid="00199de8"/>
    </style:style>
    <style:style style:name="T2" style:family="text">
      <style:text-properties officeooo:rsid="001b3759"/>
    </style:style>
    <style:style style:name="T3" style:family="text">
      <style:text-properties fo:font-variant="normal" fo:text-transform="none" fo:color="#0a0a0a" loext:opacity="100%" fo:font-family="'Google Sans', Arial, 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 Mamun Rahman &lt;<text:a xlink:type="simple" xlink:href="mailto:mamunrahman436@gmail.com" text:style-name="Internet_20_link" text:visited-style-name="Visited_20_Internet_20_Link">mamunrahman436@gmail.com</text:a>&gt;</text:p>
      <text:p text:style-name="P2">Sent: Thursday , April 23, 2026 11:47 AM</text:p>
      <text:p text:style-name="Standard">To: Fashions Glob gr<text:span text:style-name="T1">o</text:span>up &lt;arwetprocessltd@.com&gt;</text:p>
      <text:p text:style-name="P3"><text:span text:style-name="T2">Subject: </text:span><text:span text:style-name="T3">Application for Knitting Production.</text:span></text:p>
      <text:p text:style-name="Standard"/>
      <text:p text:style-name="Standard">Dear Sir</text:p>
      <text:p text:style-name="Standard">I hope you are doing well.</text:p>
      <text:p text:style-name="P4">My name is Mamun Rahman. I have completed my graduation in Textile Engineering and have two years of practical experience working as a Production Officer in the knitting section.</text:p>
      <text:p text:style-name="Standard"/>
      <text:p text:style-name="Standard">I am writing to express my interest in applying for a position in the Knitting Section of Palmal Group of industries. <text:span text:style-name="T1">I</text:span> have good knowledge of circular knitting machines, fabric quality control, GSM calculation, and production planning. I am also skilled in computer operations and able to work efficiently under pressure.</text:p>
      <text:p text:style-name="Standard"/>
      <text:p text:style-name="Standard">During my previous job, I successfully handled production targets, reduced fabric defects, and maintained smooth machine operation. I always focus on quality and productivity improvement.</text:p>
      <text:p text:style-name="Standard"/>
      <text:p text:style-name="Standard">I would be very grateful if you kindly consider my application and give me an opportunity to work in your reputed organization. I am confident that I can contribute effectively to your knitting team.</text:p>
      <text:p text:style-name="Standard"/>
      <text:p text:style-name="Standard">Please feel free to contact me for any further information or interview.</text:p>
      <text:p text:style-name="Standard"/>
      <text:p text:style-name="Standard">Thank you for your time and consideration.</text:p>
      <text:p text:style-name="Standard">Sincerely,</text:p>
      <text:p text:style-name="Standard">Mamun Rahman</text:p>
      <text:p text:style-name="Standard">Email: mamunrahman436@gmail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MAN</meta:initial-creator>
    <meta:creation-date>2026-04-23T22:31:40.032954931</meta:creation-date>
    <dc:date>2026-04-23T23:43:06.821254494</dc:date>
    <dc:creator>ARMAN</dc:creator>
    <meta:editing-duration>PT13M35S</meta:editing-duration>
    <meta:editing-cycles>2</meta:editing-cycles>
    <meta:generator>LibreOffice/25.8.5.2$Linux_X86_64 LibreOffice_project/580$Build-2</meta:generator>
    <meta:document-statistic meta:table-count="0" meta:image-count="0" meta:object-count="0" meta:page-count="1" meta:paragraph-count="15" meta:word-count="193" meta:character-count="1263" meta:non-whitespace-character-count="1085"/>
  </office:meta>
</office:document-meta>
</file>
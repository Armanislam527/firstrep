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34cc"/>
    </style:style>
    <style:style style:name="P2" style:family="paragraph" style:parent-style-name="Standard">
      <style:text-properties officeooo:paragraph-rsid="000bf04d"/>
    </style:style>
    <style:style style:name="T1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তারিখঃ ০৩/০৪/২০২৬</text:p>
      <text:p text:style-name="Standard"/>
      <text:p text:style-name="Standard">বরাবর,</text:p>
      <text:p text:style-name="Standard"/>
      <text:p text:style-name="Standard">মহা বাবস্থাপক</text:p>
      <text:p text:style-name="Standard"/>
      <text:p text:style-name="Standard">মেঘনা পি.<text:span text:style-name="T1"> ভি. সি. </text:span>লিমিটেড, মেঘনাঘাট, সোনারগাঁও, নারায়ণগঞ্জ।</text:p>
      <text:p text:style-name="Standard"/>
      <text:p text:style-name="Standard">বিষয়ঃ <text:s/>চাকুরি হতে অব্যাহতির জন্য আবেদন।</text:p>
      <text:p text:style-name="Standard"/>
      <text:p text:style-name="Standard">জনাব,</text:p>
      <text:p text:style-name="Standard"/>
      <text:p text:style-name="P1">যথাবিধি সম্মান পূর্বক বিনীত নিবেদন এই যে, আমি মোঃ হাবিবুর রহমান, আইডি ১৬৫১২৬, আপনার অধীনস্থ মেঘনা পি.<text:span text:style-name="T1"> ভি. সি. </text:span>লিমিটেড -এ জুনিয়র অপারেটর পদে অত্যন্ত সততা এবং নিষ্ঠার সাথে গত ১৯/১১/২০২৫ ইং তারিখ হতে অদ্যাবধি ফ্ল্যাকিং সেকশনে কর্মরত আছি।</text:p>
      <text:p text:style-name="Standard"/>
      <text:p text:style-name="Standard">আমার ব্যাক্তিগত সমস্যা থাকার কারণে এই চাকুরী করা আমার পক্ষে সম্ভব হচ্ছেনা।</text:p>
      <text:p text:style-name="Standard"/>
      <text:p text:style-name="Standard">এমতাবস্থায় আমার ব্যাক্তিগত সমস্যা থাকার কারণে এই পদে কর্মরত থাকা সম্ভব হচ্ছেনা। তাই আমি ০৪/০৪/২০২৬ ইং তারিখ হতে চাকুরি থেকে অব্যাহতির জন্য আবেদন করছি।</text:p>
      <text:p text:style-name="Standard"/>
      <text:p text:style-name="P2">অতএব, আমার আবেদনটি যথাযযভাবে গ্রহণপূর্বক <text:s/>০৪/০৪/২০২৬ <text:s/>ইং তারিখ হতে আমার অব্যাহতি অনুমোদনের জন্য আপনার সদয় বিবেচনা এবং প্রয়োজনীয় বাবস্থা গ্রহণের বিনীত অনুরোধ করছি।</text:p>
      <text:p text:style-name="Standard"/>
      <text:p text:style-name="Standard">নিবেদক,</text:p>
      <text:p text:style-name="Standard"/>
      <text:p text:style-name="Standard"/>
      <text:p text:style-name="Standard"/>
      <text:p text:style-name="P2">মোঃ হাবিবুর রহমান</text:p>
      <text:p text:style-name="Standard"/>
      <text:p text:style-name="P2">আইডি: <text:s/>১৬৫১২৬</text:p>
      <text:p text:style-name="Standard"/>
      <text:p text:style-name="P2">পদবি: জুনিয়র অপারেটর।</text:p>
      <text:p text:style-name="P2"/>
      <text:p text:style-name="Standard">ফ্ল্যাকিং সেকশন, প্রোডাকশন বিভাগ।</text:p>
      <text:p text:style-name="Standard"/>
      <text:p text:style-name="P2">মেঘনা পি.<text:span text:style-name="T1"> ভি. সি. </text:span>লিমিটেড।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MAN</meta:initial-creator>
    <meta:creation-date>2026-04-03T11:01:06.122923684</meta:creation-date>
    <dc:date>2026-04-03T12:38:34.604111255</dc:date>
    <dc:creator>ARMAN</dc:creator>
    <meta:editing-duration>PT12M40S</meta:editing-duration>
    <meta:editing-cycles>2</meta:editing-cycles>
    <meta:generator>LibreOffice/25.8.5.2$Linux_X86_64 LibreOffice_project/580$Build-2</meta:generator>
    <meta:document-statistic meta:table-count="0" meta:image-count="0" meta:object-count="0" meta:page-count="1" meta:paragraph-count="16" meta:word-count="136" meta:character-count="606" meta:non-whitespace-character-count="481"/>
  </office:meta>
</office:document-meta>
</file>